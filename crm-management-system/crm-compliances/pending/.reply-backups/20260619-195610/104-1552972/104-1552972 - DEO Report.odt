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1552972</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The citizen says that my two children are special children, the school bus drops them point to point, they don't leave them infont of house, so it's a big problem, special children can't walk so look at this problem of ours and let's drop all the children from our house to school, from school to home.</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