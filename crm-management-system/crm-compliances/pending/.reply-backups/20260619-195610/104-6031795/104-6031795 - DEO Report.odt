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3179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hief Minister Complaint Center received a complaint regarding the issue that the school management is providing Urdu medium textbooks to students who are enrolled in the English medium stream, and the complainant has requested the relevant department, School Education Department (SED), to look into the matter and resolve the issue, please. Furthermore, the complainant has requested that strict disciplinary action be taken against the school administration for this negligence which is affecting the students' academic progress." EMIS CODE 35210999</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