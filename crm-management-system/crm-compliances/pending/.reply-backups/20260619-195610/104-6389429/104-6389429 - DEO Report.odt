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8942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he Chief Minister's Complaint Centre has received a complaint regarding non-response to two registered appeals submitted to the School Education Department. The complainant states that a review/revision appeal was submitted on 26 March 2026 to the Secretary, School Education, Mr Mudassir Riaz, and a second appeal was submitted on 20 April 2026. The registration numbers of these appeals are 1193 and 1253, respectively. The complainant further reports that despite the passage of considerable time, no response, decision, or acknowledgement has been received on either of the registered appeals, causing delay and concern regarding the disposal of the matter. Consequently, the complainant has requested the relevant authorities, including the School Education Department Punjab, to urgently review the status of appeal numbers 1193 and 1253, provide a formal response or decision, and ensure timely disposal of pending departmental appeals in accordance with rules and procedures. “*"“1NNnel Dana 4</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