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785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Subject: Complaint Regarding Unfair Admission Criteria NSCOE Respected Principal, I am writing to express my concern and disappointment regarding the admission criteria for Pre-KG admissions. As per the current policy, admissions are only being offered to children aged 3.5 years, while no admissions are being granted to KG students. I find this criterion unfair and difficult for families with more than one child. My daughter has been selected, but my son has been rejected due to the age criteria. It is not practical for me to enroll my children in different schools. Siblings should ideally be given the opportunity to study together in the same institution for the convenience of parents and the emotional well-being of children. Furthermore, I am concerned about the admission test conducted for children as young as three years old. Young children are being assessed on writing and other skills that are often taught at home by parents. At such an early age, a child's admission should not depend heavily on academic abilities. Schools are meant to nurture and develop these foundational skills rather than expect them before admission. I respectfully request the school administration to review and reconsider this admission policy and provide a fair solution for families facing similar situations. I hope my concerns will be taken seriously and addressed appropriately. Yours sincerely, [Your Name] [Contact Number] I am writing to express my concern and disappointment regarding the admission criteria for Pre-KG admissions. As per the current policy, admissions are only being offered to children aged 3.5 years, while no admissions are being granted to KG students. I find this criterion unfair and difficult for families with more than one child. My daughter has been selected, but my son has been rejected due to the age criteria. It is not practical for me to enroll my children in different schools. Siblings should ideally be given the opportunity to study together in the same institution for the convenience of parents and the emotional well-being of children. Furthermore, I am concerned about the admission test conducted for children as young as three years old. Young children are being assessed on writing and other skills that are often taught at home by parents. At such an early age, a child's admission should not depend heavily on academic abilities. Schools are meant to nurture and develop these foundational skills rather than expect them before admission. I respectfully request the school administration to review and reconsider this admission policy and provide a fair solution for families facing similar situations. I hope my concerns will be taken seriously and addressed appropriately. Yours sincerely, Dr.Rabia Atif 03331439338</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