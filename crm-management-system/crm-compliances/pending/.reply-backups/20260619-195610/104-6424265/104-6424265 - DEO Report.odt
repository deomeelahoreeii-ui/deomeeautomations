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24265</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o the Honorable Chief Minister, Punjab Respected Madam Maryum Nawaz Sharif, I am a resident of PP 159 and I humbly submit this application to bring to your attention a matter of grave injustice and distress. My father, Maqsood Ahmed, serves as the headmaster at Government Boys Primary School, Bhabra, Lahore. On 5th December, 2025, he was called upon in the office by the Deputy District Education Officer, Mr. Ali Farhan. Without any lawful explanation, his salary was stopped, and my father was asked to report to the secretariat office. In his place, a favored teacher was appointed as the headmistress by Mr. Ali Farhan. This entire situation has caused severe financial and psychological stress to the entire family and my father in particular. Due to the continuous pressure and stress, his health has deteriorated significantly, and he is currently not in a stable mental condition. My family is facing extreme hardship. We live in a rented house and have been unable to pay the dues for the past four months. To add salt to injury, the department has asked my father to appear before a hearing (for the false allegations that they have put forward) tomorrow, i.e., 20/5/26 (Wednesday). How can a man who doesn't even recognize his own children as of now present his defense? This is a grave injustice. Madam, this issue is not just about financial injustice but also about the mental well-being and dignity of a government servant who has served with honesty and dedication. If any harm comes to my father or his health deteriorates any further, I will be compelled to hold the Deputy DEO Mr. Ali Farhan responsible and lodge an FIR against him. I earnestly request you to intervene and to immediately release my father's pending salaries and to protect him from further harassment. Your attention to this matter would provide the much-needed relief for my family. I am attaching the document that he was presented with when the allegations first appeared. Regards, Rabia Maqsood</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