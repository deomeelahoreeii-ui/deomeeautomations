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273524</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Citizen says that, as informed earlier, he was working in the School Education Department and retired three years ago. He further states that some of his dues and remaining payments are still pending and have not been cleared yet. The citizen mentions that despite the passage of time, he has not received his outstanding payments. He requests the concerned department to look into the matter and release all his pending dues at the earliest.</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