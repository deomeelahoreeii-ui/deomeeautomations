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96000000E8FB647BB3.png" manifest:media-type="image/png"/>
  <manifest:file-entry manifest:full-path="Pictures/10000000000000C7000000B37A3A905C.png" manifest:media-type="image/png"/>
  <manifest:file-entry manifest:full-path="Thumbnails/thumbnail.png" manifest:media-type="image/png"/>
</manifest:manifest>
</file>

<file path=content.xml><?xml version="1.0" encoding="utf-8"?>
<office:document-content xmlns:draw="urn:oasis:names:tc:opendocument:xmlns:drawing:1.0" xmlns:fo="urn:oasis:names:tc:opendocument:xmlns:xsl-fo-compatible:1.0" xmlns:ns5="urn:org:documentfoundation:names:experimental:office:xmlns:loext:1.0" xmlns:ns6="http://openoffice.org/2009/office" xmlns:office="urn:oasis:names:tc:opendocument:xmlns:office:1.0" xmlns:style="urn:oasis:names:tc:opendocument:xmlns:style:1.0" xmlns:svg="urn:oasis:names:tc:opendocument:xmlns:svg-compatible:1.0" xmlns:table="urn:oasis:names:tc:opendocument:xmlns:table:1.0" xmlns:text="urn:oasis:names:tc:opendocument:xmlns:text:1.0" xmlns:xlink="http://www.w3.org/1999/xlink" office:version="1.4">
  <office:scripts/>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automatic-styles>
    <style:style style:name="Table3" style:family="table">
      <style:table-properties style:width="6.65in" fo:margin-left="0in" fo:margin-top="0in" fo:margin-bottom="0in" table:align="left" style:writing-mode="page"/>
    </style:style>
    <style:style style:name="Table3.A" style:family="table-column">
      <style:table-column-properties style:column-width="1.6979in"/>
    </style:style>
    <style:style style:name="Table3.B" style:family="table-column">
      <style:table-column-properties style:column-width="4.9521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style>
    <style:style style:name="Table1" style:family="table">
      <style:table-properties style:width="7.6257in" fo:margin-left="-0.2319in" table:align="left"/>
    </style:style>
    <style:style style:name="Table1.A" style:family="table-column">
      <style:table-column-properties style:column-width="3.9993in"/>
    </style:style>
    <style:style style:name="Table1.B" style:family="table-column">
      <style:table-column-properties style:column-width="3.6264in"/>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margin-left="0in" fo:margin-top="0in" fo:margin-bottom="0in" style:contextual-spacing="false" fo:text-indent="0in" style:auto-text-indent="false" fo:break-before="page"/>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ns6:paragraph-rsid="001c8166" style:font-name-asian="Times New Roman" style:font-size-asian="12pt" style:font-style-asian="normal" style:font-weight-asian="bold" style:font-name-complex="Calibri1" style:font-weight-complex="bold"/>
    </style:style>
    <style:style style:name="P2" style:family="paragraph" style:parent-style-name="Standard_20__28_WW_29_">
      <style:text-properties style:font-name="Calibri" fo:font-weight="bold" ns6:paragraph-rsid="001c8166" style:language-asian="en" style:country-asian="US" style:font-weight-asian="bold" style:font-name-complex="Calibri1" style:language-complex="ar" style:country-complex="SA"/>
    </style:style>
    <style:style style:name="P3" style:family="paragraph" style:parent-style-name="Standard_20__28_WW_29_">
      <style:paragraph-properties fo:margin-left="1in" fo:text-align="center" style:justify-single-word="false">
        <style:tab-stops>
          <style:tab-stop style:position="3.1744in"/>
        </style:tab-stops>
      </style:paragraph-properties>
      <style:text-properties ns6:paragraph-rsid="001c8166"/>
    </style:style>
    <style:style style:name="P4" style:family="paragraph" style:parent-style-name="Standard_20__28_WW_29_">
      <style:paragraph-properties fo:margin-left="1in" fo:text-align="center" style:justify-single-word="false"/>
      <style:text-properties ns6:paragraph-rsid="001c8166"/>
    </style:style>
    <style:style style:name="P5" style:family="paragraph" style:parent-style-name="Standard_20__28_WW_29_">
      <style:paragraph-properties fo:margin-left="1in" fo:text-align="center" style:justify-single-word="false"/>
      <style:text-properties ns6:paragraph-rsid="0046cd95"/>
    </style:style>
    <style:style style:name="P6" style:family="paragraph" style:parent-style-name="Standard">
      <style:paragraph-properties fo:margin-left="0in" fo:text-indent="0in" style:auto-text-indent="false"/>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ns6:paragraph-rsid="001c8166" style:font-name-asian="Times New Roman" style:font-size-asian="12pt" style:font-style-asian="normal" style:font-weight-asian="bold" style:font-name-complex="Calibri1" style:font-weight-complex="bold"/>
    </style:style>
    <style:style style:name="P7" style:family="paragraph" style:parent-style-name="Standard_20__28_WW_29_">
      <style:text-properties ns6:paragraph-rsid="001c8166"/>
    </style:style>
    <style:style style:name="P8" style:family="paragraph" style:parent-style-name="Standard_20__28_WW_29_">
      <style:text-properties fo:color="#000000" ns5:opacity="100%" style:font-name="Bookman Old Style" fo:font-weight="bold" ns6:paragraph-rsid="003f469d" style:font-name-asian="Times New Roman" style:font-weight-asian="bold" style:font-name-complex="Calibri1" style:font-weight-complex="bold"/>
    </style:style>
    <style:style style:name="P9" style:family="paragraph" style:parent-style-name="Standard_20__28_WW_29_">
      <style:text-properties fo:color="#000000" ns5:opacity="100%" style:font-name="Bookman Old Style" fo:font-weight="bold" ns6:paragraph-rsid="001c8166" style:font-name-asian="Times New Roman" style:font-weight-asian="bold" style:font-name-complex="Calibri1" style:font-weight-complex="bold"/>
    </style:style>
    <style:style style:name="P10" style:family="paragraph" style:parent-style-name="Standard_20__28_WW_29_">
      <style:paragraph-properties fo:margin-left="0in" fo:text-indent="0in" style:auto-text-indent="false"/>
      <style:text-properties ns6:paragraph-rsid="002125b8"/>
    </style:style>
    <style:style style:name="P11" style:family="paragraph" style:parent-style-name="Table_20_Contents">
      <style:paragraph-properties fo:text-align="center" style:justify-single-word="false"/>
      <style:text-properties fo:font-weight="bold" ns6:rsid="001d93e2" ns6:paragraph-rsid="001d93e2" style:font-weight-asian="bold" style:font-weight-complex="bold"/>
    </style:style>
    <style:style style:name="P12" style:family="paragraph" style:parent-style-name="Text_20_body">
      <style:paragraph-properties fo:margin-left="0in" fo:text-align="justify" style:justify-single-word="false" fo:text-indent="0in" style:auto-text-indent="false"/>
      <style:text-properties fo:font-size="10pt" ns6:paragraph-rsid="00413ba8" style:font-size-asian="10pt" style:font-size-complex="10pt"/>
    </style:style>
    <style:style style:name="P13" style:family="paragraph" style:parent-style-name="Text_20_body">
      <style:paragraph-properties fo:text-align="justify" style:justify-single-word="false" fo:orphans="0" fo:widows="0"/>
      <style:text-properties style:font-name="Google Sans Text" fo:font-size="9pt" fo:font-weight="normal" ns6:paragraph-rsid="005323e3" style:font-size-asian="9pt" style:font-weight-asian="normal" style:font-size-complex="9pt" style:font-weight-complex="normal"/>
    </style:style>
    <style:style style:name="P14" style:family="paragraph" style:parent-style-name="Standard">
      <style:paragraph-properties fo:margin-left="0in" fo:text-indent="0in" style:auto-text-indent="false"/>
      <style:text-properties fo:font-variant="normal" fo:text-transform="none" style:use-window-font-color="true" ns5:opacity="0%" style:font-name="system-ui" fo:font-size="12pt" fo:letter-spacing="normal" fo:font-style="normal" style:text-underline-style="none" fo:font-weight="normal" ns6:paragraph-rsid="001c8166" style:font-name-asian="Times New Roman" style:font-size-asian="12pt" style:font-style-asian="normal" style:font-weight-asian="normal" style:font-name-complex="Calibri1" style:font-weight-complex="normal"/>
    </style:style>
    <style:style style:name="P15" style:family="paragraph" style:parent-style-name="Standard_20__28_WW_29_">
      <style:paragraph-properties fo:text-align="justify" style:justify-single-word="false" fo:text-indent="0.5in" style:auto-text-indent="false" ns5:word-spacing-minimum="75%" ns5:word-spacing-maximum="133%"/>
      <style:text-properties fo:color="#000000" ns5:opacity="100%" style:font-name="Bookman Old Style" ns6:paragraph-rsid="001c8166"/>
    </style:style>
    <style:style style:name="P16" style:family="paragraph" style:parent-style-name="Standard_20__28_WW_29_">
      <style:paragraph-properties fo:text-align="justify" style:justify-single-word="false" ns5:word-spacing-minimum="75%" ns5:word-spacing-maximum="133%"/>
      <style:text-properties fo:color="#000000" ns5:opacity="100%" style:font-name="Bookman Old Style" ns6:paragraph-rsid="001c8166"/>
    </style:style>
    <style:style style:name="P17" style:family="paragraph" style:parent-style-name="Standard_20__28_WW_29_">
      <style:paragraph-properties fo:margin-left="3in" fo:text-align="center" style:justify-single-word="false"/>
      <style:text-properties fo:color="#000000" ns5:opacity="100%" style:font-name="Bookman Old Style" fo:font-weight="bold" ns6:paragraph-rsid="001c8166" style:font-weight-asian="bold"/>
    </style:style>
    <style:style style:name="P18" style:family="paragraph" style:parent-style-name="Standard_20__28_WW_29_">
      <style:paragraph-properties fo:margin-left="3in" fo:text-align="center" style:justify-single-word="false"/>
      <style:text-properties ns6:paragraph-rsid="003d9c8e"/>
    </style:style>
    <style:style style:name="P19" style:family="paragraph" style:parent-style-name="List_20_Paragraph">
      <style:paragraph-properties fo:margin-left="0in"/>
      <style:text-properties ns6:paragraph-rsid="001c8166"/>
    </style:style>
    <style:style style:name="P20" style:family="paragraph" style:parent-style-name="List_20_Paragraph" style:list-style-name="WWNum1">
      <style:paragraph-properties fo:margin-top="0in" fo:margin-bottom="0.111in" style:contextual-spacing="true"/>
      <style:text-properties fo:color="#000000" ns5:opacity="100%" style:font-name="Bookman Old Style" ns6:paragraph-rsid="001c8166"/>
    </style:style>
    <style:style style:name="P21" style:family="paragraph" style:parent-style-name="List_20_Paragraph">
      <style:paragraph-properties fo:margin-left="0in" fo:margin-top="0in" fo:margin-bottom="0.111in" style:contextual-spacing="true" fo:text-indent="0in" style:auto-text-indent="false"/>
      <style:text-properties fo:color="#000000" ns5:opacity="100%" style:font-name="Bookman Old Style" ns6:rsid="003bb5e8" ns6:paragraph-rsid="003bb5e8"/>
    </style:style>
    <style:style style:name="T1" style:family="text">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2" style:family="text">
      <style:text-properties style:font-name="Calibri" fo:font-weight="bold" style:language-asian="en" style:country-asian="US" style:font-weight-asian="bold" style:font-name-complex="Calibri1" style:language-complex="ar" style:country-complex="SA"/>
    </style:style>
    <style:style style:name="T3" style:family="text">
      <style:text-properties style:font-name="Calibri" style:language-asian="en" style:country-asian="US" style:font-family-complex="Arial" style:font-family-generic-complex="system" style:font-pitch-complex="variable" style:language-complex="ar" style:country-complex="SA"/>
    </style:style>
    <style:style style:name="T4" style:family="text">
      <style:text-properties style:font-name="Bookman Old Style" fo:font-weight="bold" style:language-asian="en" style:country-asian="US" style:font-weight-asian="bold" style:font-name-complex="Calibri1" style:language-complex="ar" style:country-complex="SA"/>
    </style:style>
    <style:style style:name="T5" style:family="text">
      <style:text-properties style:font-name="Bookman Old Style" style:text-underline-style="solid" style:text-underline-width="auto" style:text-underline-color="font-color" fo:font-weight="bold" ns6:rsid="005b06bd" style:language-asian="en" style:country-asian="US" style:font-weight-asian="bold" style:font-name-complex="Calibri1" style:language-complex="ar" style:country-complex="SA"/>
    </style:style>
    <style:style style:name="T6" style:family="text">
      <style:text-properties style:font-name="Bookman Old Style" style:text-underline-style="solid" style:text-underline-width="auto" style:text-underline-color="font-color" fo:font-weight="bold" ns6:rsid="00420054" style:language-asian="en" style:country-asian="US" style:font-weight-asian="bold" style:font-name-complex="Calibri1" style:language-complex="ar" style:country-complex="SA"/>
    </style:style>
    <style:style style:name="T7" style:family="text">
      <style:text-properties style:font-name="Bookman Old Style" style:text-underline-style="solid" style:text-underline-width="auto" style:text-underline-color="font-color" fo:font-weight="bold" ns6:rsid="0046ee86" style:language-asian="en" style:country-asian="US" style:font-weight-asian="bold" style:font-name-complex="Calibri1" style:language-complex="ar" style:country-complex="SA"/>
    </style:style>
    <style:style style:name="T8" style:family="text">
      <style:text-properties style:font-name="Bookman Old Style" style:text-underline-style="solid" style:text-underline-width="auto" style:text-underline-color="font-color" fo:font-weight="bold" ns6:rsid="003dae70" style:language-asian="en" style:country-asian="US" style:font-weight-asian="bold" style:font-name-complex="Calibri1" style:language-complex="ar" style:country-complex="SA"/>
    </style:style>
    <style:style style:name="T9" style:family="text">
      <style:text-properties style:font-name="Bookman Old Style" style:text-underline-style="solid" style:text-underline-width="auto" style:text-underline-color="font-color" fo:font-weight="bold" ns6:rsid="0057ee17" style:language-asian="en" style:country-asian="US" style:font-weight-asian="bold" style:font-name-complex="Calibri1" style:language-complex="ar" style:country-complex="SA"/>
    </style:style>
    <style:style style:name="T10" style:family="text">
      <style:text-properties fo:color="#000000" ns5:opacity="100%" style:font-name="Bookman Old Style" fo:font-weight="bold" style:font-name-asian="Times New Roman" style:font-weight-asian="bold" style:font-name-complex="Calibri1" style:font-weight-complex="bold"/>
    </style:style>
    <style:style style:name="T11" style:family="text">
      <style:text-properties ns6:rsid="003fa767"/>
    </style:style>
    <style:style style:name="T12" style:family="text">
      <style:text-properties fo:font-variant="normal" fo:text-transform="none" style:use-window-font-color="true" ns5:opacity="0%" style:font-name="system-ui" fo:font-size="12pt" fo:letter-spacing="normal" fo:font-style="normal" style:text-underline-style="none" fo:font-weight="bold" style:font-name-asian="Times New Roman" style:font-size-asian="12pt" style:font-style-asian="normal" style:font-weight-asian="bold" style:font-name-complex="Calibri1" style:font-weight-complex="bold"/>
    </style:style>
    <style:style style:name="T13" style:family="text">
      <style:text-properties fo:font-variant="normal" fo:text-transform="none" style:use-window-font-color="true" ns5:opacity="0%" fo:font-family="'Bitstream Vera Sans'" style:font-family-generic="swiss" style:font-pitch="variable"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14" style:family="text">
      <style:text-properties fo:font-variant="normal" fo:text-transform="none" style:use-window-font-color="true" ns5:opacity="0%" style:font-name="system-ui" fo:font-size="12pt" fo:letter-spacing="normal" fo:font-style="normal" style:text-underline-style="none" fo:font-weight="normal" style:font-name-asian="Times New Roman" style:font-size-asian="12pt" style:font-style-asian="normal" style:font-weight-asian="normal" style:font-name-complex="Calibri1" style:font-weight-complex="normal"/>
    </style:style>
    <style:style style:name="T15" style:family="text">
      <style:text-properties fo:color="#000000" ns5:opacity="100%" style:font-name="Bookman Old Style"/>
    </style:style>
    <style:style style:name="T16" style:family="text">
      <style:text-properties fo:color="#000000" ns5:opacity="100%" style:font-name="Bookman Old Style" fo:font-weight="bold" style:font-weight-asian="bold"/>
    </style:style>
    <style:style style:name="fr1"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style:flow-with-text="true" draw:wrap-influence-on-position="once-concurrent" ns5:allow-overlap="true" ns5:decorative="false"/>
    </style:style>
    <style:style style:name="fr2"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ns5:allow-overlap="true" ns5: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ns5:marker-style-name="T1"><text:span text:style-name="Strong_20_Emphasis"><text:span text:style-name="T1"/></text:span></text:p>
      <table:table table:name="Table3" table:style-name="Table3">
        <table:table-column table:style-name="Table3.A"/>
        <table:table-column table:style-name="Table3.B"/>
        <table:table-row table:style-name="Table3.1">
          <table:table-cell table:style-name="Table3.A1" office:value-type="string">
            <text:p text:style-name="P2" ns5:marker-style-name="T2"><draw:frame draw:style-name="fr1" draw:name="Picture 6 Copy 1 Copy 1" text:anchor-type="char" svg:x="0.0047in" svg:y="-0.0799in" svg:width="1.1854in" svg:height="1.0283in" draw:z-index="0"><draw:image xlink:href="Pictures/10000000000000C7000000B37A3A905C.png" xlink:type="simple" xlink:show="embed" xlink:actuate="onLoad" draw:mime-type="image/png"/><svg:desc>Description: C:\Users\Asim Mehmood\Desktop\download.jpg</svg:desc></draw:frame></text:p>
          </table:table-cell>
          <table:table-cell table:style-name="Table3.A1" office:value-type="string">
            <text:p text:style-name="P3" ns5:marker-style-name="T3"><text:span text:style-name="T4">OFFICE OF THE</text:span></text:p>
            <text:p text:style-name="P4" ns5:marker-style-name="T3"><text:span text:style-name="T4">DISTRICT EDUCATION OFFICER (M-EE)</text:span></text:p>
            <text:p text:style-name="P4" ns5:marker-style-name="T4"><text:span text:style-name="T4">LAHORE</text:span></text:p>
            <text:p text:style-name="P5" ns5:marker-style-name="T4"><text:span text:style-name="T4">No. </text:span><text:span text:style-name="T5">1510/PMDU</text:span><text:span text:style-name="T6">/</text:span><text:span text:style-name="T7">CRM</text:span></text:p>
            <text:p text:style-name="P5" ns5:marker-style-name="T3"><text:span text:style-name="T8">Dated </text:span><text:span text:style-name="T5">17</text:span><text:span text:style-name="T8">/0</text:span><text:span text:style-name="T9">6</text:span><text:span text:style-name="T8">/2026</text:span></text:p>
          </table:table-cell>
        </table:table-row>
      </table:table>
      <text:p text:style-name="P6" ns5:marker-style-name="T1"><text:span text:style-name="Strong_20_Emphasis"><text:span text:style-name="T1"/></text:span></text:p>
      <text:p text:style-name="P7" ns5:marker-style-name="T10"><text:span text:style-name="T10">To: <text:tab/><text:tab/></text:span></text:p>
      <text:p text:style-name="P8" ns5:marker-style-name="T10"><text:tab/><text:tab/><text:span text:style-name="T11">The </text:span>Chief Executive Officer (DEA), </text:p>
      <text:p text:style-name="P8" ns5:marker-style-name="T10"><text:tab/><text:tab/>Lahore</text:p>
      <text:p text:style-name="P9" ns5:marker-style-name="T10"/>
      <text:p text:style-name="P10"><text:span text:style-name="Strong_20_Emphasis"><text:span text:style-name="T1">Subject: </text:span></text:span><text:span text:style-name="Strong_20_Emphasis"><text:span text:style-name="T12"><text:tab/></text:span></text:span><text:span text:style-name="Strong_20_Emphasis"><text:span text:style-name="T13">COMPLAINT NO. 104-6609317</text:span></text:span></text:p>
      <text:p text:style-name="P10"><text:span text:style-name="Strong_20_Emphasis"><text:span text:style-name="T13"/></text:span></text:p>
      <table:table table:name="Table1" table:style-name="Table1">
        <table:table-column table:style-name="Table1.A"/>
        <table:table-column table:style-name="Table1.B"/>
        <table:table-row>
          <table:table-cell table:style-name="Table1.A1" office:value-type="string">
            <text:p text:style-name="P11">Complaint Details</text:p>
          </table:table-cell>
          <table:table-cell table:style-name="Table1.B1" office:value-type="string">
            <text:p text:style-name="P11">Remarks</text:p>
          </table:table-cell>
        </table:table-row>
        <table:table-row>
          <table:table-cell table:style-name="Table1.A2" office:value-type="string">
            <text:p>Sir I would like come to know the status of complaint 1045891911 dated 1.5.2026.Whay critaria</text:p>
          </table:table-cell>
          <table:table-cell table:style-name="Table1.B2" office:value-type="string">
            <text:p text:style-name="P13">Respected Worthy Chief Executive Officer (DEA),</text:p>
            <text:p text:style-name="P13">The complaint forwarded from the honorable Chief Minister's CRM portal has been carefully reviewed.<text:line-break/>Upon formal evaluation and verification by the Deputy District Education Officer (M-EE), Model Town , it has been officially ascertained that the applicant's group insurance claim cannot be processed as it is legally time-barred. Official records confirm that the applicant's late father retired from service in 2011 and subsequently passed away in 2014. The initiation of this financial claim at this current stage falls well beyond the permissible statutory time limit stipulated by prevailing government regulations, rendering the initiation of further administrative proceedings impossible. <text:line-break/>Furthermore, regarding the allegations of uncooperative behavior against the clerical staff (specifically Mr. Rashid) at the DDEO office, a thorough internal review was conducted. The competent authority has categorically refuted these claims as completely baseless. It is officially reported that the applicant was appropriately guided and politely informed regarding the strict departmental rules governing time-barred cases, with absolutely no instances of misbehavior, negligence, or harassment on the part of the office staff.</text:p>
            <text:p text:style-name="P13">Since the financial claim is strictly time-barred under government regulations and the behavioral allegations have been formally investigated and proven baseless by the concerned field office, this grievance requires no further administrative intervention. The matter has been dealt with strictly in accordance with rules and policy. <text:s/><text:line-break/>Submitted for further necessary action, please.</text:p>
          </table:table-cell>
        </table:table-row>
      </table:table>
      <text:p text:style-name="P14"><draw:frame draw:style-name="fr2" draw:name="Picture 1 Copy 1 Copy 1" text:anchor-type="char" svg:x="4.2925in" svg:y="0.1236in" svg:width="1.7098in" svg:height="0.9756in" draw:z-index="1"><draw:image xlink:href="Pictures/1000000100000196000000E8FB647BB3.png" xlink:type="simple" xlink:show="embed" xlink:actuate="onLoad" draw:mime-type="image/png"/><draw:contour-polygon svg:width="1.8047in" svg:height="1.0295in" svg:viewBox="0 0 4584 2615" draw:points="26,0 26,2615 4610,2615 4610,0" draw:recreate-on-edit="false"/></draw:frame><text:span text:style-name="Strong_20_Emphasis"><text:span text:style-name="T14"/></text:span></text:p>
      <text:p text:style-name="P15" ns5:marker-style-name="T15"/>
      <text:p text:style-name="P16" ns5:marker-style-name="T15"/>
      <text:p text:style-name="P17" ns5:marker-style-name="T16"/>
      <text:p text:style-name="P17" ns5:marker-style-name="T16"/>
      <text:p text:style-name="P17" ns5:marker-style-name="T16"/>
      <text:p text:style-name="P18" ns5:marker-style-name="T16"><text:span text:style-name="T16">DISTRICT EDUCATION OFFICER (M-EE)</text:span></text:p>
      <text:p text:style-name="P18" ns5:marker-style-name="T16"><text:span text:style-name="T16">LAHORE</text:span></text:p>
      <text:p text:style-name="P7" ns5:marker-style-name="T16"><text:span text:style-name="T16">CC.</text:span></text:p>
      <text:p text:style-name="P19"/>
      <text:list text:style-name="WWNum1">
        <text:list-item>
          <text:p text:style-name="P20">Office Record. </text:p>
        </text:list-item>
      </text:list>
      <text:p text:style-name="P2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tandard_20__28_WW_29_" style:display-name="Standard (WW)" style:family="paragraph">
      <style:paragraph-properties fo:margin-top="0in" fo:margin-bottom="0in" style:contextual-spacing="false" fo:line-height="100%" fo:text-align="left" style:justify-single-word="false" fo:orphans="2" fo:widows="2" fo:hyphenation-ladder-count="no-limit" fo:hyphenation-keep="auto" loext:hyphenation-keep-type="column" loext:hyphenation-keep-line="false" style:vertical-align="baseline"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Noto Sans Devanagari1" style:font-family-complex="'Noto Sans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List_20_Paragraph" style:display-name="List Paragraph" style:family="paragraph" style:parent-style-name="Standard">
      <style:paragraph-properties fo:margin-left="0.5in" fo:margin-top="0in" fo:margin-bottom="0in" style:contextual-spacing="tru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1" style:display-name="ListLabel 1" style:family="text">
      <style:text-properties fo:font-weight="bold" style:font-weight-asian="bold"/>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4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30T13:38:32.178966972</meta:creation-date>
    <meta:editing-cycles>56</meta:editing-cycles>
    <meta:editing-duration>PT3H3M51S</meta:editing-duration>
    <dc:date>2026-06-18T20:38:30.065272783</dc:date>
    <meta:generator>LibreOffice/26.2.4.2$Linux_X86_64 LibreOffice_project/c44d3140fc62714965bf5d98735e0d79ba4b1ebd</meta:generator>
    <meta:print-date>2026-05-11T15:31:55.957393221</meta:print-date>
    <meta:printed-by>PDF files</meta:printed-by>
    <meta:document-statistic meta:table-count="2" meta:image-count="2" meta:object-count="0" meta:page-count="1" meta:paragraph-count="19" meta:word-count="319" meta:character-count="2243" meta:non-whitespace-character-count="1931"/>
  </office:meta>
</office:document-meta>
</file>