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3993</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s Complaint Center received a complaint regarding the issue that the complainant has stated that, despite the announcement regarding relief in school fees during the three-month summer vacation period, the administration of National School is continuing to charge fees from students. The complainant has requested the relevant department, School Education Department, to look into the matter, verify compliance with the applicable government directives, and take appropriate action to resolve the issue, pleas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