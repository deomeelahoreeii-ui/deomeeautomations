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746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 private school, Lahore Maktab Trust School, 20 km Ferozeour Road, Lahore (0301-8431157), instead of the Education department's instructions, is conducting regular classes for 9 and 10 classes, observing regular school timing from 8 am to 2:30 pm. They have announced a plan to continue classes till 22 June 2026. They were observing the school uniform policy, but from tomorrow, they have asked the students to come in coloured clothes. You are requested to take action against the management ASAP. Thank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