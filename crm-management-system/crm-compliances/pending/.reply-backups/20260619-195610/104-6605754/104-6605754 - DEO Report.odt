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575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 ■ ■■■■ ■■ ■■■■■ ■■ ■■■ ■■ ■■■ ■■■■■ ■■■■ ■■■ ■■■■ ■■■■■■ ■■■■■ ■■ ■■■ ■■ ■■■■■ ■■■■ ■■■■ ■■ ■■■ ■■■■■ ■■■ ■■ ■■■■ ■■ ■■■■■■ ■■■■ ■■■■ ■■■■■ ■■■: ■■■■ ■■■■ ■■■■■ ■■■■ ■■■ ■■■■ (■■■■ ■■■■■■ ■■■■■ ■■■■■■ ■■■■■) ■■■■ ■■■■■■■ ■■■■ (■■■■■ ■■■■■ ■■■■■ ■■ ■■■■■■■■ - PBCC) ■■■■■ ■■■■■ ■■■■■ ■■■■■■ ■■ ■■■■ ■■■■■ ■■■ ■■ ■■■■■■ ■■■■ ■ ■■■■■■ ■■■ ■■■■■■ ■■ ■■■■ ■■ ■■ ■■■■■■ ■■■■■■■ ■■ ■■ ■■■ ■■■■ ■■■■ ■■■ ■■■■ ■■ ■■ ■■ ■■■ ■■■ ■■ ■■ ■■ ■■■ ■■■■■ ■■■ ■■■■■■■■■ (■■■■ ■■■■ ■■■■■■■■■ ■■■■■■■) ■■ ■■■■■ ■■■■ ■■■ ■■ ■■■ ■■■ ■■■ ■■■ ■■ (SLO) ■■■■ ■■■■ ■■ ■■ ■■■ ■■ ■■■■ ■■■■ ■■ ■■■■ ■■■■ ■■■■ ■■■ ■■■■ ■■ ■■■ ■■ ■■■■ ■■■■ ■■ ■■■■■■■■ ■■ ■■■ ■■■■■ ■■ ■■■■ ■■■■■■ ■■■■ ■■ ■■■■ ■■■■■■ ■■■ ■■■ ■■■■■■■■■■■ ■■ ■■■■■■ ■■ ■■■■ ■■■■■ ■■ ■■■ ■■■ ■■■■■■ ■■■■■ ■■■ ■■■■■ ■■■■■■■: ■■■■ ■■■■■ ■■ ■■■ ■■■■■ ■■■■■■■■: ■■■■■ ■■■■ (FBISE) ■■■ ■■■■ ■■ ■■■■■■ ■■■■■ ■■■■■ ■■■■■■■■ ■■ ■■■■■ ■■■ ■■■■■■■ ■■■ ■■■■■■ ■■ ■■■■■ ■■ ■■■■■ ■■ ■■■■ ■■■■ ■■ ■■ ■■■■ ■■ ■■■■ ■■ ■■■■ ■■■■■ ■■■ ■■■■■■■■■■■ ■■■ ■■■■■ ■■ ■■■ ■■■■ ■■■ ■■ ■■■■ ■■■ ■■■■■ ■■ ■■■■■■ ■■■■■ ■■ ■■■ ■■■ ■■■■ ■■■ ■■■ ■■■■■ ■■■ ■■ ■■■ ■■■■ ■■ ■■■ ■■■■■ ■■■ ■■■■■ ■■ ■■■■■■ ■■■■ ■■■■ ■■■■■: ■■■■■ ■■ ■■■■ ■■■■ ■ ■■■■■■ ■■ ■■■■■ ■■■■■■ ■■ ■■ ■■■■■ ■■ ■■■■■■ ■■■■■ ■■ ■■■ ■■ ■■■ ■■■ ■■■■■ ■■ ■■■■■ ■■■■ ■■■ ■■■■: ■■■ ■■■■ (Matric Part-II): ■■■■■■ ■■ ■■■■■ ■■■■ ■■■ ■■■ ■■■■ (Matric Part-I): ■■■■■■ ■■ ■■■■ ■■■■ ■■■ ■■■■■■■ ■■■■ (Inter Part-II): ■■■■ ■■ ■■■■■ ■■■■ ■■■ ■■■■■■■■ ■■■■ (Inter Part-I): ■■■■ ■■ ■■■■ ■■■■ ■■■ ■■■ ■■■■■ ■■ ■■■■ ■■■ ■■■■■■ ■■■ ■■ ■■■■: ■■■■■ ■■■■ ■■■ ■■ ■■■ ■■■■ ■■ ■■■ ■■ ■■■■ ■■ ■■■■ ■■■■■ ■■ ■■■■■ ■■ ■■■ ■■■■■ ■■■ ■■■■■ ■■■ ■■■ ■■■■■ ■■■■■ ■■ ■■■■■■ ■■ ■■■■■■ ■■■■ ■■ ■■■■■■■■■■■ ■■ ■■■■■ ■■■ ■■ ■■■■■ ■■ ■■■ ■■■■ ■■■■■■ ■■■ ■■■■■■ ■■■■ ■■ ■■■■ ■■■ ■■■■■ ■■ ■■■■ ■■■ ■■■■■ ■■■■■■■ ■■■■■■: ■■ ■■ ■■■■■ ■■ ■■ ■■■■■ ■■■ ■■ ■■■■ ■■ ■■■■■■ ■■ ■■■ ■■■■■ ■■■■ ■■■■ ■■■■■■ ■■■■■ (■■■■■■ ■■■■■■■■ ■■■■■■ ■■■■■■■■ ■■■■■) ■■ ■■■■■ ■■ ■■■■■■ ■■■ ■■■■ ■■■ ■■■■■■ ■ ■■■■ ■■ ■■■■ ■■■■■ ■■ ■■■■ ■■■■■ ■■■■ ■■ ■■■ ■■■■■■■ ■■■■ ■■■ ■■■■■■ ■■■ ■■■■ ■■ ■■ ■■■■ ■■■ ■■■■■■ ■■■■■■ ■■ ■■■■ ■■■■■■■■ ■■■ ■■ ■■■ ■■■ ■■■ ■■■■■■ ■■■■ ■■■■■■ ■■■■ ■■ ■■■■■ ■■■ ■■ ■■■■ ■■■ ■■■■■ ■■■■■■■ ■■■■ ■■■■■■ ■■■■■■ ■■ ■■■■ ■■ ■■■ ■■■■■ ■■■■ ■■■■■ ■■■■■ ■■■■■ ■■ ■■■■ ■■ ■■■■■ ■■■■ ■■■■■ ■■■■■■ ■■■ ■■■■■■■ ■■■ ■■■■ ■■ ■■■■■ ■■■ ■■■ ■■■■ ■■ ■■ ■■ ■■■■ ■■ ■■ ■■■■ ■■ ■■■■ ■■ ■■■ ■■■■■■ ■■ ■■■■■ ■■■■ ■■■ ■■■■■■: ■■■■■ ■■■ ■■ ■■■■ ■ ■■■■■■ ■■■ ■■■■■■■ ■■■■■■ ■■■■■■ ■■■■■: 4 ■■■ 2026■</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