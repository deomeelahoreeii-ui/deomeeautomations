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251810</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Dangerous building. Not a skilled staff. Very old building. Plzz check this school and take serious action .</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