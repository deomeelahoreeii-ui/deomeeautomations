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5202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Private schools are still charging full fees during summer vacations. The fee should either be waived completely or charged partially during this period.</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