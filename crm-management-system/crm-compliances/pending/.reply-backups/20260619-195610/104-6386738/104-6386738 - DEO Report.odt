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8673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In school, children are made to clean, work to be done household chores to be done. Instead of the queen, people get blessings for her work in the fields and household chores.</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