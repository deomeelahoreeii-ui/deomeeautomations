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4758591</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My daughter got admission in phase 2 of Maryam Nawaz School for Autism and Resource center which is a great initiative as my daughter is autistic. The phase 1 began in February and it was said the phase 2 would begin in 4 weeks and a number was given for updates which don't pick and neither replies on WhatsApp. I have to plan the therapies of my daughter if given a clear date and plan. This is not a complaint just a pointing</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