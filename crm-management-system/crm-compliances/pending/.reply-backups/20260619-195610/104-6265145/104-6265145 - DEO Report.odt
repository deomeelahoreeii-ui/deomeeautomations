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265145</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Respected Authority. Being a School Teacher Intern,I want to let you know that we have joined from February 24,2026 and till now its been almost 3 months and we didn't get our monthly stipend yet. Minister was asked in a live session they said it is being paid but I want to make you aware of the matter.Kindly make sure to release our stipend</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