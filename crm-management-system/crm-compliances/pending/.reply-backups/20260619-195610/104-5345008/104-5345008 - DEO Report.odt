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3450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itizen states that this complaint has been submitted to the Chief Minister’s Complaint Center regarding serious misconduct, harassment, and violation of due process by officials of the Punjab Examination Commission. The citizen has been serving as a teacher at Punjab Group of Colleges since 2014 and was later selected by the Punjab Examination Commission, Wahdat Road, as a Subject Specialist. Following this selection, the citizen was called for an interview for the position of item writer. During the interview, the citizen was not only threatened for proposing difficult and standard-based questions but was also subjected to harassment and undue pressure, and was forcibly made to leave. Subsequently, punitive actions were taken against the citizen without any formal justification.The citizen further states that according to the law, if any complaint is made against a government employee, the concerned individual must be formally informed inwriting and given an opportunity to respond. However, in this case, no written notice was ever provided, and instead, thecitizen was subjected to intimidation and unlawful treatment. The citizen lodged complaints with the Secretary Education aswell as the then Chief Minister, but no action or response was received from the concerned departments.This matterreflects a serious violation of transparency, merit, and legal procedure, and has caused significant professional and mentaldistress to the citizen. The citizen strongly requests the Chief Minister’s Complaint Center to take immediate notice of thisissue, initiate a fair and transparent inquiry, hold the responsible officials accountable, and ensure justice is providedwithout further delay.</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