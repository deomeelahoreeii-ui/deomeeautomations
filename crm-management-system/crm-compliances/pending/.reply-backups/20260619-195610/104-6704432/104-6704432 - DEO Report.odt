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704432</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 ■■■■■■ 2026■ ■■■ ■■■■■■■ ■■ ■■■■■■■■■ ■■■■■■■ ■■■■ ■■■ ■■■■■■ ■■ ■■■■ ■■■■ ■■■■ ■■■■■■■■ ■■ ■■■■■■■ ■■■ ■■■■ ■■■■■ ■■ ■■■■■■■</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