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262882</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M Mariyam Sahiba ny hm jaisy gareebo k lye Autisam Sachool bnwaya but waha hmary bacho ko addimission ni diya gya or na he hmy inform kiya gya plz ap hmy baten hm ny itna arsa wait kiya or end py sbi approch waly logo k bacho ko addimision diya gya hy</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