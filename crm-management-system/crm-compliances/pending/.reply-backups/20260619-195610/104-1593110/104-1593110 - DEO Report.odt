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9311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 ■■■■■ ■■■■■ ■■■■■ ■■■■ ■■ ■■■■■■ ■ ■■■■■■ ■■■■ ■■■■■■ ■■■■■■■■■ ■■■■■■ ■■■■ ■■■■ ■■■■■ (■■■■■ ■■■■: Maryam Nawaz Autism &amp; Resource Center) ■■■■■■ ■■■■■■ ■■■■■! ■■■■■■■■ ■■■■■ ■■ ■■ ■■ ■■ ■■■■ ■■ ■■■■■ ■■■■ ■■ ■■■ ■■■■ ■■■ ■■■ ■■■■■ ■■■■■ ■■■■■ Maryam Nawaz Autism &amp; Resource Center ■■■■■ ■■■■ ■■■ ■■ ■■ ■■■■■■ ■■ ■■■ ■■■■ ■■ ■■■ ■■■■ ■■■■ ■■■ ■■ ■■■■■ ■■■■■■ ■■ ■■ ■■ ■■ ■■ ■■ ■■■ ■■■■ ■■■■ ■■■■■■■ ■■■ ■■ ■■ ■■ ■■■■ ■■■ ■■■: ■■■■■ ■■■■ ■■■■ ■■■■■ ■■■■■ ■■■■■■■ ■■ ■■■■ ■■■■ ■■ ■■■ Autism Spectrum Disorder ■■■■ ■■■ ■■■ ■■ Lissencephaly ■■■■ ■■■■■ ■■■■■■■■■■■ ■■■■■■ ■■■■ ■■■ ■■ ■■■■■■ ■■■■ ■■■■■ ■■■■■■■ ■■ ■■■■ ■■■■ ■■■■ ■■ ■■ ■■■■■■ ■■■■■■ ■■■■■■ ■■■ ■■■■■ ■■■■■■■ ■■■■■ ■■■■ ■■ ■■■■ ■■■ ■■ ■■ ■■ ■■■■■ ■■■■ ■■ ■■ ■■■■ ■■■■ ■■■■■ ■■■ ■■■■■ ■■■■■ ■■■■■■ ■■■■■ ■■■■■■■ ■■■■■■■■■■ ■■■■■■ ■■■ ■■■■ ■■■■ ■■■■■ ■■■■ ■■ ■■■■ ■■■■■■ ■■ ■■■ ■■■■■ ■■■■■ ■■■ ■■■■■ ■■ ■■ ■■■■■ ■■■■■■■ ■■■ ■■■■■■■ ■■■■■■■ ■■ ■■ ■■■■ ■■■■■ ■■■■ ■■ Maryam Nawaz Autism &amp; Resource Center ■■■ ■■■■■ ■■■■■ ■■■■■■ ■■■■ ■■■■ ■■ ■■■■ ■■■■■■ ■■■ ■■■■■■■ ■■■ ■■■■■■ ■■■■■ ■■ ■■■ ■■■■■ ■■ ■■■■■ ■■ ■■ ■■ ■■ ■■ ■■ ■■■■ ■■■■■ ■■■ ■■ ■■■ ■■■■■ ■■■ ■■■ ■■■■ ■■■■■ ■■■ ■■ ■■ ■■■■■ ■■■■ ■■ ■■■■■■ ■■ ■■■■■ ■■■■ ■■■■■■■ ■■■ ■■■■ ■■■■■■ ■■ ■■ ■■■■ ■■■■■ ■■■ ■■ ■■■■■ ■■■ ■■■■■■■ ■■■■■■■ ■■■■■■ ■■■: ■■■■■ ■■■■ ■■■■ ■■■■ CNIC: 32102-5372288-9 ■■■■■ ■■■■: 03356163060</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