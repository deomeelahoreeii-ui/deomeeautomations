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9284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Request for Consideration Regarding Missed Interview Respected Mam Maryam Nawaz, My name is Fariha Naz, and I am from Lahore. I recently applied for the position of ABA Therapist at Maryam Nawaz Autism School. Unfortunately, I received the interview email on 2nd February 2026, and the interview was scheduled for 3rd February 2026. I was unable to check my Gmail in time and therefore missed the opportunity to attend. I hold a Master’s degree and am currently seeking employment. Despite my qualifications, I am still without a job and facing personal and professional challenges. As the eldest daughter in my family, my parents have always encouraged me to pursue education and contribute meaningfully to society. I humbly request your kind consideration for rescheduling my interview or providing guidance on how I may still be considered for the position. I sincerely hope for your understanding and support. Thank you for your time and consideration. Yours sincerely, Fariha Naz Lahore, Pakistan If you want, I can also draft a shorter, more emotional version that might appeal more personally to the recipient while still being professional. This can increase the chance of a compassionate response. Do you want me to do that? You said: In interview 11 pm mail ChatGPT said: Ah! So you mean the interview email came very late at 11 PM, which is why you couldn’t see it in time. We can revise your complaint to clearly highlight that. Here’s an updated version: Subject: Request for Consideration Regarding Missed Interview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e late timing of the email, I was unable to see it in time and missed the interview. I hold a Master’s degree and am currently seeking employment. Despite my qualifications, I am still without a job and facing personal and professional challenges. As the eldest daughter in my family, my parents have always encouraged me to pursue education and contribute meaningfully to society. I humbly request your kind consideration for rescheduling my interview or providing guidance on how I may still be considered for the position. I sincerely hope for your understanding and support. Thank you for your time and consideration. Yours sincerely, Fariha Naz Lahore, Pakistan If you want, I can also make it even more concise and heartfelt, emphasizing the late email and your dedication, so it grabs attention quickly. Do you want me to do that? You said: I visit special education head office and they say ab kuch ni ho skta these word break me and question on my education and also question my parents whose want her daughter educated and change our days and I never forget my parents sacrifices.. Please it's humble request ChatGPT said: I understand. You want your message to reflect both the emotional impact of what happened and your humble request for consideration. Here’s a revised version of your complaint incorporating these points: Subject: Humble Request for Consideration Regarding Missed Interview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e late timing of the email, I was unable to see it in time and missed the interview. When I visited the Special Education Head Office to explain my situation, I was told that nothing could be done. During the visit, my education and dedication were questioned, and my parents—who have always sacrificed and encouraged me to pursue education—were also questioned. These words and actions were deeply hurtful, and I cannot forget the sacrifices my parents have made for me. I humbly request your kind consideration for rescheduling my interview or providing guidance on how I may still be considered for the position. I sincerely hope for understanding and support, as this opportunity means a great deal to me and my family. Thank you for your time and consideration. Yours sincerely, Fariha Naz Lahore, Pakistan If you want, I can also create a very short, emotionally strong version that is easier to read and more likely to get a compassionate response from Mam Maryam Nawaz. This version would focus on your parents’ sacrifices, the late email, and the hurtful experience at the office. Do you want me to do that? You said: Also give me job it's request ChatGPT said: Got it. You want your message to clearly include a humble request for the job while keeping it respectful and heartfelt. Here’s a revised version: Subject: Humble Request for Job Consideration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is late email, I was unable to see it in time and missed the interview. When I visited the Special Education Head Office to explain my situation, I was told that nothing could be done. During the visit, my education and dedication were questioned, and even my parents—who have always sacrificed and encouraged me to pursue education—were questioned. These words deeply hurt me, and I cannot forget my parents’ sacrifices for my education. I humbly request your kind consideration to grant me this job opportunity or guide me on how I may still be considered for the position. This opportunity means a great deal to me and my family, and I am ready to serve with dedication and sincerity. I sincerely hope for your understanding and support. Thank you very much for your time and consideration. Yours sincerely, Fariha Naz Lahore, Pakistan If you want, I can also make a very short, emotional version under 200 words that emphasizes your parents’ sacrifices, the late email, and your humble plea for the job. This is often more effective for personal letters like this. Do you want me to do that version too? You said: Also add I mail back on Maryam Nawaz but still no response ChatGPT said: Absolutely! Here’s the updated version of your request including the point that you emailed Maryam Nawaz but have not received any response: Subject: Humble Request for Job Consideration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is late email, I was unable to see it in time and missed the interview. When I visited the Special Education Head Office to explain my situation, I was told that nothing could be done. During the visit, my education and dedication were questioned, and even my parents—who have always sacrificed and encouraged me to pursue education—were questioned. These words deeply hurt me, and I cannot forget my parents’ sacrifices for my education. I also emailed Mam Maryam Nawaz to explain my situation, but unfortunately, I have not received any response. I humbly request your kind consideration to grant me this job opportunity or guide me on how I may still be considered for the position. This opportunity means a great deal to me and my family, and I am ready to serve with dedication and sincerity. I sincerely hope for your understanding and support. Thank you very much for your time and consideration. Yours sincerely, Fariha Naz Lahore, Pakistan If you want, I can also craft a more concise, emotionally powerful version that’s likely to grab attention and increase the chance of a positive response. This could be under 150–180 words. Do you want me to do that version as well? You said: Also add.. Mam I fullfill on all criteria and it's request today I listen about this portal on city 42 news. And give me hope for this ChatGPT said: Perfect! We can include all of that to make your letter more complete, heartfelt, and hopeful. Here’s the fully updated version: Subject: Humble Request for Job Consideration Respected Mam Maryam Nawaz, My name is Fariha Naz, and I am from Lahore. I recently applied for the position of ABA Therapist at Maryam Nawaz Autism School. Unfortunately, I received the interview email very late, at 11 PM on 2nd February 2026, and the interview was scheduled for 3rd February 2026. Due to this late email, I was unable to see it in time and missed the interview. When I visited the Special Education Head Office to explain my situation, I was told that nothing could be done. During the visit, my education and dedication were questioned, and even my parents—who have always sacrificed and encouraged me to pursue education—were questioned. These words deeply hurt me, and I cannot forget my parents’ sacrifices for my education. I also emailed Mam Maryam Nawaz to explain my situation, but unfortunately, I have not received any response. Mam, I fulfill all the criteria for this position, and I sincerely request your kind consideration. Today, I heard about this portal on City 42 News, and it gave me hope for this opportunity. I humbly request that you grant me this job opportunity or guide me on how I may still be considered for the position. This opportunity means a great deal to me and my family, and I am ready to serve with dedication and sincerity. I sincerely hope for your understanding and support. Thank you very much for your time and consideration. Yours sincerely, Fariha Naz Lahore, Pakista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