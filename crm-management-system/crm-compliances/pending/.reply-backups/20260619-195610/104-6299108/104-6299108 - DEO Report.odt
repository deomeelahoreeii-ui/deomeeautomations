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29910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e Chief Minister Complaint Center has received a complaint regarding the lack of proper cleanliness arrangements in government schools located on Gazi Road, Miller Road, and Shaukat Town. The complainant stated that there is no proper cleaning system in these schools. Classrooms and school areas are not cleaned by any designated staff. As a result, students, whether young or older, are forced to clean their classrooms themselves in the morning. It is further stated that the only available janitorial staff is limited to cleaning garbage from the school grounds, while no proper cleaning of classrooms is being done. When the school management was approached regarding this issue, they responded in a careless and inappropriate manner, stating that this is how government schools operate. The complainant requests that: Proper cleaning staff (janitorial system) be appointed and supervised in the schools. Students should not be assigned cleaning duties. The school management’s behavior and negligence be investigated. Clean and hygienic environment be ensured for students. Kindly take immediate action to improve the sanitation and management system in these schools.</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