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5120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We as a community add our share to better the conditions of the school but the CEO of schools don't bother to post a night chokidar at the school or ( approx 6 kanal) so repeated theft incidents have occurred. on 25th or 26th night again thieves entered the school, broke the locks and a substantial loss occurred. The school wall 180 feet long and 8 feet high had fallen for the last few months and the school was unprotected and no funds were provided by the CEO's office. We by our own sources has completed the wall this week instead of waiting for funds from the CEO's office which is least bothered to correct the plight of poor +200 kids. Please look into the matter so problems may be solved. Hope a top priority will be given to the matter and the police may be approached to apprehend the thieves. With regards, Azhar Bhatti phase 8 dha lahore 03008540192</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