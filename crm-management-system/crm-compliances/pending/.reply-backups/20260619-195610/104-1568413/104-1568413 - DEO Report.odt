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156841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Mare bati k minde k masla hy jo app ny new school bany hy me wah gy hy wah be koi masla hal ni kai plz mare help kry plz</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