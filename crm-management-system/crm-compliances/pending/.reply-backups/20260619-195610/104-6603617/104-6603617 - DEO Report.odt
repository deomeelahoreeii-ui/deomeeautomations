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361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o The Chief Minister Punjab Subject: Complaint Regarding Non-Payment of Salary and Security Deposit Respected Madam, I am writing to formally lodge a complaint against the administration of my campus regarding the non-payment of my salary and security deposit. I have been serving as an English Teacher at The Smart School Gulshan E Ravi Campus for the past three and half years and have fulfilled my duties responsibly and professionally. However, despite repeated requests, my salary for the last month has not been released. In addition, my security deposit amounting to Rs. 25,000 has also not been returned. I have approached the school administration and head offices several times to resolve this matter, but no satisfactory response has been provided. The unnecessary delay in releasing my dues has caused me financial hardship and considerable stress. I respectfully request you to investigate this matter and ensure the immediate payment of my pending salary and the return of my security deposit. I would appreciate your prompt intervention and a fair resolution of this issue.Thank you for your attention and cooperation. Your's Sincerely, Faiza Saeed CNIC# 3740589190732 Dated:04-06-26</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