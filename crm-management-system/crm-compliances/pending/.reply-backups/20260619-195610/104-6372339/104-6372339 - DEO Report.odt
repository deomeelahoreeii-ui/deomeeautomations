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7233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complaint concerning a matter related to the School Education. The Citizen says that a government-run sewing and embroidery institute in their locality has been illegally occupied by land grabbers, completely halting all vocational training and leaving the public facility completely non-functional. To safeguard public property and benefit the community, it is highly recommended to immediately evict the illegal occupants and merge this vacant building with the nearby overcrowded government school to accommodate its growing student strength. The complainant has requested that you look into the matter and resolve the issue, please. Labri Institue Near Gulzar Havali</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