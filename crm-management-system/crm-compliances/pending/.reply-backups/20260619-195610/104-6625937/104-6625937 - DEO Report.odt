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2593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As school teacher Intern I want to let you know that our contract was from 24feburary 2026 to 31 May 2026 but we have received salary upto 21 May in Mianwali District.Kindly make sure to release our pending payment as clerks are telling that it is deducted due to summer vocations..</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