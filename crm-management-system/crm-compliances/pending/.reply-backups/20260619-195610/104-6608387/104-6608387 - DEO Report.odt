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838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itizen say that I would like to file a complaint against American Lyceum School regarding the collection of fees during the summer vacation period. My children are students at this school. The administration is demanding full fees for the three months of summer holidays. They are also stating that if the fees are not paid, they will not provide the summer vacation homework to the students. This practice is unfair and places an unnecessary financial burden on parents. As per government directives, there should be no fee charged for the summer vacation period. Linking the provision of educational work with fee payment is also inappropriate. I kindly request the concerned authorities to take strict action against this matter and ensure that schools follow the proper rules and regulation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