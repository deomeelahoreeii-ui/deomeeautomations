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6005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Relief and Flexibility in Educational Attendance and Fine Policies for Working Students To Honourable Chief Minister Maryam Nawaz Sharif Government of Punjab Respected Madam, I hope you are doing well. I am writing this letter with utmost respect to bring your kind attention towards the difficulties faced by many students in private educational institutions, especially regarding strict attendance policies and heavy fines. A significant number of students are not fully financially dependent on their parents. Many are working part-time or full-time jobs to support their education as well as to manage household responsibilities. In such situations, maintaining strict attendance becomes extremely difficult. However, universities and colleges often impose heavy fines and strict penalties for low attendance, which creates additional financial and mental pressure on already struggling students. I belong to Faisalabad and I am a married individual with two children. I carry full responsibility for my family's daily expenses. If 1 do not work, I am unable to meet basic needs such as food, rent, and other necessities for my children. Despite these challenges, I am determined to continue my education so that I can secure a better future for myself and my family, In such circumstances, I respectfully request your kind consideration to introduce or recommend a more flexible policy for students who are genuinely facing financial and personal hardships. Education should serve as a path of improvement and stability, not a source of additional burden due to rigid attendance rules and fines. Unfortunately, there have also been distressing incidents reported in educational institutions, including a recent case in Lahore where a student reportedly took his own life due to academic pressure and attendance-related stress. Such incidents highlight the urgent need for a more compassionate and supportive educational environment where students are guided and assisted rather than pushed into extreme distress. My humble request is that education policies, especially regarding attendance and fines. should include some form of relief or exemotion for students who are -Generated on 5/19/2026.1 Pane 1</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