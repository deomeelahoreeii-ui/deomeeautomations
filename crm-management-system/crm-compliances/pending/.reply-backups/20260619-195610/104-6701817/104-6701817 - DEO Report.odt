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70181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Dear Sir/Madam, Assalam u Alaikum, I hope you are doing well. I checked my degree on the HEC portal, but the HEC attestation/stamp is not showing on my degree record. I have already uploaded and attached all the required documents for verification. Kindly review my case and update the status accordingly. My details are as follows: Name: Ali Kamran University: University of South Asia Degree: BSCS I would also like to bring to your attention that I have submitted multiple complaints regarding this issue. My latest complaint ticket number is **3542903**. Despite creating several complaints, I have not received a satisfactory response from the concerned department. Whenever I contact the department by phone, I am instructed to upload all required documents. However, I have already provided all the requested records and supporting documents multiple times. Unfortunately, the issue remains unresolved. I kindly request you to investigate this matter, review my submitted documents, and resolve the issue at the earliest possible convenience. Your assistance and prompt response will be highly appreciated. Thank you. Best Regards, Ali Kamran</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