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676270</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The Chief Minister's Complaint Center has received a grievance from the widow of the late Malik Muhammad Anas, a former government school teacher, regarding the persistent negligence and obstructive conduct of the institutional clerk, Muhammad Nawaz, at the deceased teacher's last station of posting on Hall Road, Lahore. The complainant states that following her husband's demise over two years ago, she has frequently visited the school to initiate her legitimate family pension case; however, the concerned clerk (contact number 0300-4123408) consistently defers the matter by offering evasive delays and false promises, rendering no actual progress on her file. According to the complainant, this prolonged and deliberate inaction on the part of the clerical staff has subjected her to immense psychological distress and financial hardship during an already difficult bereavement period. The complainant expresses profound concern that the bureaucratic lethargy and lack of empathy displayed by the school administration severely undermine the welfare policies enacted for the families of deceased public servants. Consequently, the complainant has requested the relevant authorities, including the Secretary of the School Education Department Punjab, the Chief Executive Officer (CEO) of the District Education Authority (DEA) Lahore, and the Principal of the concerned institution on Hall Road, to immediately intervene, direct the administration to process the family pension case without further delay, and initiate strict disciplinary action against the clerk, Muhammad Nawaz, for professional misconduct and harassment of a widow, please.</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