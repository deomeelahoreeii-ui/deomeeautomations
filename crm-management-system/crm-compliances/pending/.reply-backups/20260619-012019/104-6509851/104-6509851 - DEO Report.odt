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0985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Aoa Allied school bukhtyari campus 2 months ki fees ikthi mang rhy hn or 1st june se summer camp start kr rhy hn or in ko fees b bht ziada hy aik nursery classbk bchy ki fees thora kam krwa b 5k to 6k hy or is k ilawa baqi charges or course b alehda se lena prta hy ji 6k to 7k tk ata hy ap ppz in k khilaf action lein me aik single parent hun itni fees nhi de skti ap ppz private schools k khilaf action lein bht ziada fees lety hn aik achy school me prhna sb bachun or parents k haq hta h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