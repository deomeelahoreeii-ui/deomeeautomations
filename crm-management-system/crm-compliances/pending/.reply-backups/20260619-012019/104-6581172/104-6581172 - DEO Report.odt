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581172</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Overcharge for note books, and summer and winter pack although parents have paid 5k annual charges. Private schools compell parents to buy copies from school (300Rs each copy while its original worth is 150-180 Rs in</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