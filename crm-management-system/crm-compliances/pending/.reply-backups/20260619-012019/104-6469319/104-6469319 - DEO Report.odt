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469319</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STANDARD SCHOOL SABZAZAAR OPPOSITE LDA SPORTS COMPLEX is pressuring parents to send their children to school even on FRIDAY &amp; SATURDAY and during summer vacations. The school should follow the Government's order regarding closure of school during summer vacations. Concerned quarters are requested to ensure school must be closed for academic activities during summer vacations and students must not be forced to attend school on pretext of Exams or any other reason and students must also not be threatened to be forced failed in assessment if they skipped school. The weather is very hot out there and school should not force children to attend school that may result in harming students.</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