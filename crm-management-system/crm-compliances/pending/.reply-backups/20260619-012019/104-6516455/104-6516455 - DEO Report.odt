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1645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dents of our batch are regularly attending classes, clinical duties, and practical training with the same workload, attendance requirements, and professional commitments as stipend batch. However, the absence of stipend support has placed an unfair financial burden on students, especially regarding transportation, hostel accommodation, educational materials, and daily expenses. We respectfully request the concerned authorities to review this matter on a fair and compassionate basis and reconsider our batch for stipend eligibility.</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