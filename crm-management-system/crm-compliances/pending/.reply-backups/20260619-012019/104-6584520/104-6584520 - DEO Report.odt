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8452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 Complaint Center has received a complaint regarding an issue related to the Education Department (Private Schools Regulatory Authority). The complainant stated that despite the explicit notification issued by the Punjab government declaring that private schools are not bound or permitted to collect advance fees for the two-month summer vacation, STEMP School, located on Ashiana Road( now converted to nawaz shareef school), is openly violating these directives. The complainant reported that the school administration is aggressively demanding the collection of the two-month vacation fee from parents. The complainant has requested that the relevant authorities take immediate notice of this violation, strictly enforce the government notification against the school management, and resolve the issue to protect parents from this illegal financial burden,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