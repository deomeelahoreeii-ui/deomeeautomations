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7880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Unique Junior School Bahria Town Campus. School administration has opened the school on the name of Summer camp which is blatant violation of Govt regulations. Moreover this is proving to be a mafia which Govt has no control over. It is very difficult to send our kids in this blazing hot summer. When Govt has announced vacation the how could they dare to open. Take immediate and swift action.</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