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8479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hief Minister Complaint Center received a complaint regarding the issue that students at Din-e-Islam High School Private Lahore are not being given summer vacations, and children are being forcibly called to school. The complainant has requested the relevant department, School Education Department, to look into the matter and resolve the issue,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