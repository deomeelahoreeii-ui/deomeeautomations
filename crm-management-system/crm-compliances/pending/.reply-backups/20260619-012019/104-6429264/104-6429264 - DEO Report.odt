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926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why student that not afford free get scholarships or any stipend. I request you for these type of student who cannot afford university fee please compensat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