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308813</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Assalam-o-Alaikum! Greetings I am writing this complaint against the advance fee of the month of July with the fee of May taken by the school. My daughter is studying in Tiny Home Montessory School (Location:Umar Road Islampura) in class Nursery. Every year this school administration takes the fee of the month of July in advance with the month of May. Why? It means that they are taking the fee of two Months in one go. Why? This creates too much burden on the parents. I also clarify that this school is also taking fee of summer vacations like June,July and August fee with AC Charges also without providing summer camp. They also sell their school uniform of their students with very huge amount like I bought my daugter's uniform for summer of Rs.3,500 and for winter of Rs.6,570. They don't provide their uniforms to any outsource, so we parents are forced to buy uniform from school only. They are also taking money in the name of Annual Fee and also taking money for the annual function separately. They are like doing business instead of giving education. Kindly take strict action against this school.</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