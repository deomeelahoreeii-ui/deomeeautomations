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422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I would like to register a complaint regarding Universal Grammar School Shadra, where students are still being required to attend classes despite the extreme heat conditions and the government notification regarding summer holidays. Due to the ongoing hot weather, children are facing severe difficulties in commuting to and from school and are at risk of falling ill. Despite the official instructions for summer vacations, the school administration has not implemented the holidays, causing unnecessary hardship for students and parents. I respectfully request the concerned authorities to ensure that the school follows the government notification and immediately announces summer holidays to protect the health and safety of the childre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