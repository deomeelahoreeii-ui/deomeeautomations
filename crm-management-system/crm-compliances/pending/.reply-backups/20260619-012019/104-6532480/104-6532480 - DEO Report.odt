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3248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itizen says that his daughter's school is being closed illegally. The name of the school is KIPS in Lahore. The school of other children is closed due to summer vacations. But that school has been sealed once before, but now it is closed again. The children are not being given summer vacations and are being threatened that if you do not come to school, you will be permanently expelled from the school. The girl will suffer a lot. Please take action against the school as soon as possible. (GM LOBANA /NUMBER: 03409990479 TAKE ACTION ON HER). ADDRESS: 6D MUSLIM BLOCK ALLAMA IQBAL TOWN LAHORE. KIPS SCHOOL.</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