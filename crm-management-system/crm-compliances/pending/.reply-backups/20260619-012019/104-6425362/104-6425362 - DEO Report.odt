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2536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 ■■■■■■■■ ■■■■ ■■■■■■ ■■■■■ ■■■■■ ■■■■■! ■■■■■: SIS ■■■■ ■■ ■■■■■ ■■■ ■■■ Disposal ■■■ ■■■■ ■■ ■■■■■ ■■■■■■■ ■■■ ■■ ■■ ■■■ ■■■■ PST ■■■■■■ ■■■■ ■■■ ■■■■ ■■■■■ ■■■■■ ■■■■ ■■■■■ ■■ ■■■■■ ■■ ■■■ ■■■■ ■■■■■ ■■■■■ (School Education Department) ■■ ■■■ ■■■■■■ ■■■■ ■■ ■■■■ ■■■■ SIS ■■■■ ■■■■ ■■ delete/disposal ■■ ■■■ ■■■■ ■■■■ ■■■ ■■■ ■■■ ■■■■■ ■■ ■■■ ■■■■ ■■■■ ■■ ■■■■■■ ■■■ ■■■■ ■■■ ■■ ■■ ■■■■■■ ■■■■ ■■■ ■■■■ ■■■ ■■■■ ■■ ■■■■ ■■ ■■■■■ ■■ ■■■■ ■■ ■■■■■ ■■■ ■■■ ■■■ ■■■ CEO ■■■ ■■ ■■■ ■■ ■■ ■■ ■■■■■■ (correction) ■■ ■■■■■■■ ■■■■ ■■■ ■■■■ ■■■ ■■ ■■■ ■■■ ■■■■ ■■ ■■ ■■■■■■ ■■■■■ ■■■■■■■ ■■■■ ■■■ ■■ ■■■■ ■■■■■ ■■■■■ ■■ ■■■■ ■■ ■■■■ ■■■ ■■ ■■■■■ ■■■ ■■■■■ ■■■ ■■■■■ ■■ ■■■■■ ■■ ■■■ ■■■ ■■■ ■■■■ ■■■■■■ ■■■■■■■■■ ■■■ ■■■ ■■■■ ■■■ ■■■ ■■■ ■■ ■■■■ ■■■■■ ■■■ ■■■ ■■■ ■■■ ■■■■ ■■ ■■■■ ■■■■■■ ■■■■ ■■■■ ■■■ ■■■■ ■■■■■! ■■■ ■■■■■■ ■■■■ ■■■■ ■■■ ■■■■■ ■■■■■■■ ■■ ■■■ ■■■■ ■■■■ ■■■■ ■■■ ■■■ ■■■■■ ■■ ■■■■ ■■ ■■■ ■■ ■■■■ ■■■■ ■ ■■■■ ■■■■■ ■■■■■■ ■■ ■■■■■ ■■■ ■■ ■■ ■■■■■■■ ■■■■■ ■■ ■■ ■■■■ ■■■ ■■ ■■■■ ■■■ ■■ ■■ ■■■■ ■■■■ ■■■■ disposal ■■■ ■■ ■■ ■■■■ SIS ■■■■ ■■■ ■■■ ■■■■■■ ■■■■ ■■■■ ■■ ■■■■■■■ ■■■■ ■■■■■■ ■■■■■■ ■■■■ ■■■■ ■■■■ ■■■■■ ■■ ■■■ ■■ ■■ ■■■■■■■ ■■■ ■■■■■ ■■ ■■■ ■■■■ ■■■■ ■■■ ■■■■■■ ■■■■ ■■■■ PST CNIC: 38403-3267287-5 Personal No: 32075333 Mobile: 03038366436 School GES Chak 66 NB Sargodha EMIS code 38420141</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