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9025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ir, My complaint is that my child is a student of Punjab College, Shahdara Branch. The college administration is demanding Rs. 8,000 from us under the heading of "RO Books," even though we have never received or purchased these books. They are also saying that the roll number slip will only be issued after the payment of Rs. 8,000. I also have a voice message as evidence of this demand. I kindly request you to look into this matter and take appropriate action. please don't show my name. Thank you.</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