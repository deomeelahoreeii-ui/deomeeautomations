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0974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oa allied school bukhtyari campus walun ne fees bht ziada rkhi hoi hy aik nursery class k bvhy ki fees 6k to 8k hy or is k ilawa bht se charges or courses b bht expensive hn 6k ka nursery ka course hy or ab inho june,july ki fee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