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9454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parents ki baat nai sunty , cleaning issue , summer camp ki palning nai dyy rahy keh rahy fees krway phly jama jb k parents ko bound krty h abhi krway wana kaam nai milyga</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