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78759</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My kids have called to school on the name of Summer camp in this severe weather. Totally unfair. School administration openly and blatantly challenging your</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