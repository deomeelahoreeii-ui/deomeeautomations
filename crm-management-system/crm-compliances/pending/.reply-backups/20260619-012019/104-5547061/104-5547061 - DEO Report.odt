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54706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s its too hot now a days and traveling from public transport is difficult i suggest you to make any possible way for female teachers to give them electric scooty or cars for their convenienc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