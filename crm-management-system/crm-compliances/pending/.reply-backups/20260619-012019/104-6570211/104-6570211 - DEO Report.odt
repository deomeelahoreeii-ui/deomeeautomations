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70211</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 ■■■■■■ ■■■■ ■■■■■■■! ■■■■■ ■■■■■■ !■■■■ ■■ ■■ ■■■■■ ■■ ■■■ ■■■ ■■ ■■ ■■■■ ■■■ ■■■■ ■■ ■■ ■■■ ■■■■■■■ ■■ ■■■■ ■■ ■■ ■■■■ ■■■■ 25 ■■ 31■■■ ■■■■■ ■■■■ ■■■ ■■■ ■■■ ■■ ■■■ ■■■■ ■■■■■■ ■■■■■■■ ■■■■■ ■■ ■■■■ *■■■■■ ■■■■■■* *■■■ ■■■* ■■ ■■■■■ ■■■■ ■■■■ ■■ ■■■■■ ■■ ■■■■ ■■ ■■ ■■■■■■■ ■■ ■■■ *■■■■■ ■■■■* ■■■■■ ■■■■ -■■■■ ■■ *1st term ■■ ■■■■* 6 ■■■ ■■■■ ■■■■ ■■ ■■■ ■■■ ■■■ *■■■■■■ ■■■■ ■■■■■■■* *■■■ ■■■* ■■ ■■■ ■■■■ ■■■■■■ ■■ ■■■■ ■■■■■■ ■■■ ■■■■■ ■■■■ ■■ - _■■■■ ■■■■■■ ■■■ ■■■_ ■■ *■■* ■■ ■■ ■■■ ■■■■■■■ ■■■ ■■■■ ■■ ■■■ ■■■ ■■■ ■■■■■ ■■■■■■■ ■■■■■ ■ ■■■■■■■ ■■ ■■■■■ ■■■■■■ ■■■■ ■■■■■! *■■■■■ ■■■■ ■■■■*</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