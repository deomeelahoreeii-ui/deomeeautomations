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4008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re has received a grievance regarding the alleged incorrect disposal of a complaint related to the issuance of a QR code against permanent posting orders. The complainant, Jam Muhammad Saleem, EST (Sci), serving at Govt. Boys Elementary School Chak No. 63/P, Tehsil Khanpur, District Rahim Yar Khan (EMIS: 31310061), states that he has been serving in the said school since 2017 under permanent orders issued by the CEO (DEA) Rahim Yar Khan. The complainant further states that despite permanent posting orders and repeated official correspondence, his QR code has still not been issued, due to which his status remains pending on the school tablet/online monitoring system. The complainant further reports that all relevant reports and recommendations from the CEO (DEA) Rahim Yar Khan, DEO (EEM), Dy. DEO, Assistant Education Officer, and District Monitoring authorities were sent on 20-04-2026 to the office of the Additional Secretary Elementary Education Punjab Lahore for issuance of the pending QR code according to the permanent order. It is further stated that monthly and annual monitoring reports, including MEA and District Monitoring Officer reports, continuously reflect the QR code status as pending despite the complainant working in the same school for approximately nine years. The complainant expresses concern that the departmental response stating “apply in the next transfer round” is irrelevant and incorrect, as the matter pertains to the issuance of a QR code according to already existing permanent orders, not a transfer request. The complainant further requests that the matter should not be remanded again to the CEO (DEA) Rahim Yar Khan office and instead be directly examined by the competent authorities at the Lahore level, particularly the office of the Additional Secretary Elementary Education Punjab Lahore and the Secretary School Education Department Punjab Lahore. Consequently, the complainant has requested the relevant authorities, including the School Education Department Punjab and the office of the Additional Secretary Elementary Education Punjab, Lahore, to review the complete record already submitted on 20-04-2026, verify the permanent posting orders issued by CEO (DEA) Rahim Yar Khan, and immediately issue the pending QR code according to merit and official record without further dela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