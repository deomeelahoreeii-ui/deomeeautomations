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9803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hief Minister Complaint Center received a complaint regarding the issue that the administration of Iqra Roza Tul Iqbal School is allegedly charging excessive and unauthorised fees from students and parents beyond the approved fee structure, thereby placing an unjust financial burden upon families and causing serious concern among the local community regarding transparency, fairness, and compliance with educational regulations; furthermore, the complainant has alleged that the school management is collecting additional charges without providing proper justification or official notification, which may constitute a violation of the policies and guidelines issued by the relevant educational authorities; consequently, the complainant has requested the relevant department, namely the School Education Department and the District Education Authority, to conduct a thorough inquiry into the matter, verify the legality of the fee structure being imposed by the institution, take strict action against any unlawful fee collection practices, and ensure that parents are not subjected to financial exploitation under the guise of educational expenses, pleas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