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283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LGS Johar town senior branch has continuously disobeyed government directives and they are once again doing this by starting summer vacations from 10th June and not 22nd May as per the government directive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