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58357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KIDS CAMPUS My child is studying at Kids Campus School and I have been told by the school authorities that your child is very angry, so we will not send him to school. You should get this child admitted to another school or a school for special children. However, my child is very angry, due to which I cannot get him admitted to a school for special children. Therefore, I request the school authorities to keep this child in this school.</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