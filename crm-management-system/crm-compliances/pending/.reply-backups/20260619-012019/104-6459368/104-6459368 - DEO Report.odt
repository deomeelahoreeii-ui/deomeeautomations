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5936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hief Minister Complaint Center has received a Complaint regarding an issue related to the School Education Department / District Administration. The complainant reported that the administration of America LYCTUFF school, located at E Block and 73, A/G Block, Sabzazar, Lahore, has scheduled and is conducting physical examinations for children during the official summer vacations, spanning from June 8 to June 22. This scheduling directly violates the government's official notification regarding summer vacation closures and places an undue burden on the students during extreme weather conditions. The resident requests immediate intervention by the regulatory authorities to enforce the vacation policy and take strict action against the school management for non-compliance, as the complainant wants to solve the problem as early as possibl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