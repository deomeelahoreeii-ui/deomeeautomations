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draw="urn:oasis:names:tc:opendocument:xmlns:drawing:1.0" xmlns:fo="urn:oasis:names:tc:opendocument:xmlns:xsl-fo-compatible:1.0" xmlns:ns5="urn:org:documentfoundation:names:experimental:office:xmlns:loext:1.0" xmlns:ns6="http://openoffice.org/2009/office"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57in" fo:margin-left="-0.2319in" table:align="left"/>
    </style:style>
    <style:style style:name="Table1.A" style:family="table-column">
      <style:table-column-properties style:column-width="3.9993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ns6: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ns6:paragraph-rsid="001c8166"/>
    </style:style>
    <style:style style:name="P4" style:family="paragraph" style:parent-style-name="Standard_20__28_WW_29_">
      <style:paragraph-properties fo:margin-left="1in" fo:text-align="center" style:justify-single-word="false"/>
      <style:text-properties ns6:paragraph-rsid="001c8166"/>
    </style:style>
    <style:style style:name="P5" style:family="paragraph" style:parent-style-name="Standard_20__28_WW_29_">
      <style:paragraph-properties fo:margin-left="1in" fo:text-align="center" style:justify-single-word="false"/>
      <style:text-properties ns6:paragraph-rsid="0046cd95"/>
    </style:style>
    <style:style style:name="P6"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ns6:paragraph-rsid="001c8166"/>
    </style:style>
    <style:style style:name="P8" style:family="paragraph" style:parent-style-name="Standard_20__28_WW_29_">
      <style:text-properties fo:color="#000000" ns5:opacity="100%" style:font-name="Bookman Old Style" fo:font-weight="bold" ns6:paragraph-rsid="003f469d" style:font-name-asian="Times New Roman" style:font-weight-asian="bold" style:font-name-complex="Calibri1" style:font-weight-complex="bold"/>
    </style:style>
    <style:style style:name="P9" style:family="paragraph" style:parent-style-name="Standard_20__28_WW_29_">
      <style:text-properties fo:color="#000000" ns5:opacity="100%" style:font-name="Bookman Old Style" fo:font-weight="bold" ns6: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ns6:paragraph-rsid="002125b8"/>
    </style:style>
    <style:style style:name="P11" style:family="paragraph" style:parent-style-name="Table_20_Contents">
      <style:paragraph-properties fo:text-align="center" style:justify-single-word="false"/>
      <style:text-properties fo:font-weight="bold" ns6:rsid="001d93e2" ns6:paragraph-rsid="001d93e2" style:font-weight-asian="bold" style:font-weight-complex="bold"/>
    </style:style>
    <style:style style:name="P12" style:family="paragraph" style:parent-style-name="Text_20_body">
      <style:paragraph-properties fo:margin-left="0in" fo:text-align="justify" style:justify-single-word="false" fo:text-indent="0in" style:auto-text-indent="false"/>
      <style:text-properties fo:font-size="10pt" ns6:paragraph-rsid="00413ba8" style:font-size-asian="10pt" style:font-size-complex="10pt"/>
    </style:style>
    <style:style style:name="P13" style:family="paragraph" style:parent-style-name="Text_20_body">
      <style:paragraph-properties fo:text-align="justify" style:justify-single-word="false" fo:orphans="0" fo:widows="0"/>
      <style:text-properties style:font-name="Google Sans Text" fo:font-size="9pt" fo:font-weight="normal" ns6:paragraph-rsid="005323e3" style:font-size-asian="9pt" style:font-weight-asian="normal" style:font-size-complex="9pt" style:font-weight-complex="normal"/>
    </style:style>
    <style:style style:name="P14"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none" fo:font-weight="normal" ns6:paragraph-rsid="001c8166" style:font-name-asian="Times New Roman" style:font-size-asian="12pt" style:font-style-asian="normal" style:font-weight-asian="normal" style:font-name-complex="Calibri1" style:font-weight-complex="normal"/>
    </style:style>
    <style:style style:name="P15" style:family="paragraph" style:parent-style-name="Standard_20__28_WW_29_">
      <style:paragraph-properties fo:text-align="justify" style:justify-single-word="false" fo:text-indent="0.5in" style:auto-text-indent="false" ns5:word-spacing-minimum="75%" ns5:word-spacing-maximum="133%"/>
      <style:text-properties fo:color="#000000" ns5:opacity="100%" style:font-name="Bookman Old Style" ns6:paragraph-rsid="001c8166"/>
    </style:style>
    <style:style style:name="P16" style:family="paragraph" style:parent-style-name="Standard_20__28_WW_29_">
      <style:paragraph-properties fo:text-align="justify" style:justify-single-word="false" ns5:word-spacing-minimum="75%" ns5:word-spacing-maximum="133%"/>
      <style:text-properties fo:color="#000000" ns5:opacity="100%" style:font-name="Bookman Old Style" ns6:paragraph-rsid="001c8166"/>
    </style:style>
    <style:style style:name="P17" style:family="paragraph" style:parent-style-name="Standard_20__28_WW_29_">
      <style:paragraph-properties fo:margin-left="3in" fo:text-align="center" style:justify-single-word="false"/>
      <style:text-properties fo:color="#000000" ns5:opacity="100%" style:font-name="Bookman Old Style" fo:font-weight="bold" ns6:paragraph-rsid="001c8166" style:font-weight-asian="bold"/>
    </style:style>
    <style:style style:name="P18" style:family="paragraph" style:parent-style-name="Standard_20__28_WW_29_">
      <style:paragraph-properties fo:margin-left="3in" fo:text-align="center" style:justify-single-word="false"/>
      <style:text-properties ns6:paragraph-rsid="003d9c8e"/>
    </style:style>
    <style:style style:name="P19" style:family="paragraph" style:parent-style-name="List_20_Paragraph">
      <style:paragraph-properties fo:margin-left="0in"/>
      <style:text-properties ns6:paragraph-rsid="001c8166"/>
    </style:style>
    <style:style style:name="P20" style:family="paragraph" style:parent-style-name="List_20_Paragraph" style:list-style-name="WWNum1">
      <style:paragraph-properties fo:margin-top="0in" fo:margin-bottom="0.111in" style:contextual-spacing="true"/>
      <style:text-properties fo:color="#000000" ns5:opacity="100%" style:font-name="Bookman Old Style" ns6:paragraph-rsid="001c8166"/>
    </style:style>
    <style:style style:name="P21" style:family="paragraph" style:parent-style-name="List_20_Paragraph">
      <style:paragraph-properties fo:margin-left="0in" fo:margin-top="0in" fo:margin-bottom="0.111in" style:contextual-spacing="true" fo:text-indent="0in" style:auto-text-indent="false"/>
      <style:text-properties fo:color="#000000" ns5:opacity="100%" style:font-name="Bookman Old Style" ns6:rsid="003bb5e8" ns6:paragraph-rsid="003bb5e8"/>
    </style:style>
    <style:style style:name="T1" style:family="text">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ns6:rsid="005b06b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ns6:rsid="00420054"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ns6:rsid="0046ee8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ns6:rsid="003dae70"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ns6:rsid="0057ee17" style:language-asian="en" style:country-asian="US" style:font-weight-asian="bold" style:font-name-complex="Calibri1" style:language-complex="ar" style:country-complex="SA"/>
    </style:style>
    <style:style style:name="T10" style:family="text">
      <style:text-properties fo:color="#000000" ns5:opacity="100%" style:font-name="Bookman Old Style" fo:font-weight="bold" style:font-name-asian="Times New Roman" style:font-weight-asian="bold" style:font-name-complex="Calibri1" style:font-weight-complex="bold"/>
    </style:style>
    <style:style style:name="T11" style:family="text">
      <style:text-properties ns6:rsid="003fa767"/>
    </style:style>
    <style:style style:name="T12" style:family="text">
      <style:text-properties fo:font-variant="normal" fo:text-transform="none" style:use-window-font-color="true" ns5: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ns5: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ns5: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ns5:opacity="100%" style:font-name="Bookman Old Style"/>
    </style:style>
    <style:style style:name="T16" style:family="text">
      <style:text-properties fo:color="#000000" ns5: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ns5:allow-overlap="true" ns5: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ns5:allow-overlap="true" ns5: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ns5: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ns5: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ns5:marker-style-name="T3"><text:span text:style-name="T4">OFFICE OF THE</text:span></text:p>
            <text:p text:style-name="P4" ns5:marker-style-name="T3"><text:span text:style-name="T4">DISTRICT EDUCATION OFFICER (M-EE)</text:span></text:p>
            <text:p text:style-name="P4" ns5:marker-style-name="T4"><text:span text:style-name="T4">LAHORE</text:span></text:p>
            <text:p text:style-name="P5" ns5:marker-style-name="T4"><text:span text:style-name="T4">No. </text:span><text:span text:style-name="T5">1510/PMDU</text:span><text:span text:style-name="T6">/</text:span><text:span text:style-name="T7">CRM</text:span></text:p>
            <text:p text:style-name="P5" ns5:marker-style-name="T3"><text:span text:style-name="T8">Dated </text:span><text:span text:style-name="T5">17</text:span><text:span text:style-name="T8">/0</text:span><text:span text:style-name="T9">6</text:span><text:span text:style-name="T8">/2026</text:span></text:p>
          </table:table-cell>
        </table:table-row>
      </table:table>
      <text:p text:style-name="P6" ns5:marker-style-name="T1"><text:span text:style-name="Strong_20_Emphasis"><text:span text:style-name="T1"/></text:span></text:p>
      <text:p text:style-name="P7" ns5:marker-style-name="T10"><text:span text:style-name="T10">To: <text:tab/><text:tab/></text:span></text:p>
      <text:p text:style-name="P8" ns5:marker-style-name="T10"><text:tab/><text:tab/><text:span text:style-name="T11">The </text:span>Chief Executive Officer (DEA), </text:p>
      <text:p text:style-name="P8" ns5:marker-style-name="T10"><text:tab/><text:tab/>Lahore</text:p>
      <text:p text:style-name="P9" ns5: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6425216</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CITIZEN IS REGISTERING A COMPLAINT AGAINST LGS TOWNSHIP BRANCH, LACHNA CHOWK (BRANCH REGISTRATION NO. LGS-215202100003) REGARDING AN UNFAIR FEE ISSUE. THE CITIZEN STATES THAT APRIL AND MAY FEES HAVE ALREADY BEEN PAID, AND EVEN THIS MONTH’S FEE HAS ALSO BEEN SUBMITTED. HOWEVER, NOW BANK VOUCHERS FOR JUNE, JULY, AND AUGUST HAVE BEEN ISSUED WITH A 10 PERCENT INCREASE. THE CITIZEN CONSIDERS THIS INCREASE DURING THE HOLIDAYS TO BE UNJUSTIFIED AND INAPPROPRIATE. MANY OTHER PARENTS ARE ALSO FACING THE SAME SITUATION. THE CITIZEN, ALONG WITH 30–35 OTHER AFFECTED FAMILIES, REQUESTS THE PUNJAB GOVERNMENT AND THE HONOURABLE CHIEF MINISTER TO TAKE IMMEDIATE NOTICE OF THIS MATTER AND ENSURE A FAIR RESOLUTION. THE CITIZEN ALSO REQUESTS THAT HER PERSONAL INFORMATION BE KEPT STRICTLY CONFIDENTIAL, AS HER THREE CHILDREN ARE CURRENTLY STUDYING IN THE SAME SCHOOL. FOR THE SAFETY AND SECURITY OF HER CHILDREN, HER DETAILS SHOULD NOT BE DISCLOSED OR SHARED WITH ANYONE.</text:p>
          </table:table-cell>
          <table:table-cell table:style-name="Table1.B2" office:value-type="string">
            <text:p text:style-name="P13">Respected Worthy Chief Executive Officer (DEA),</text:p>
            <text:p text:style-name="P13">The complaint forwarded from the honorable Chief Minister's CRM portal has been carefully reviewed.<text:line-break/>Upon formal evaluation and verification by the Deputy District Education Officer (M-EE), Model Town , it has been officially ascertained that the applicant's group insurance claim cannot be processed as it is legally time-barred. Official records confirm that the applicant's late father retired from service in 2011 and subsequently passed away in 2014. The initiation of this financial claim at this current stage falls well beyond the permissible statutory time limit stipulated by prevailing government regulations, rendering the initiation of further administrative proceedings impossible. <text:line-break/>Furthermore, regarding the allegations of uncooperative behavior against the clerical staff (specifically Mr. Rashid) at the DDEO office, a thorough internal review was conducted. The competent authority has categorically refuted these claims as completely baseless. It is officially reported that the applicant was appropriately guided and politely informed regarding the strict departmental rules governing time-barred cases, with absolutely no instances of misbehavior, negligence, or harassment on the part of the office staff.</text:p>
            <text:p text:style-name="P13">Since the financial claim is strictly time-barred under government regulations and the behavioral allegations have been formally investigated and proven baseless by the concerned field office, this grievance requires no further administrative intervention. The matter has been dealt with strictly in accordance with rules and policy. <text:s/><text:line-break/>Submitted for further necessary action, please.</text:p>
          </table:table-cell>
        </table:table-row>
      </table:table>
      <text:p text:style-name="P14"><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5" ns5:marker-style-name="T15"/>
      <text:p text:style-name="P16" ns5:marker-style-name="T15"/>
      <text:p text:style-name="P17" ns5:marker-style-name="T16"/>
      <text:p text:style-name="P17" ns5:marker-style-name="T16"/>
      <text:p text:style-name="P17" ns5:marker-style-name="T16"/>
      <text:p text:style-name="P18" ns5:marker-style-name="T16"><text:span text:style-name="T16">DISTRICT EDUCATION OFFICER (M-EE)</text:span></text:p>
      <text:p text:style-name="P18" ns5:marker-style-name="T16"><text:span text:style-name="T16">LAHORE</text:span></text:p>
      <text:p text:style-name="P7" ns5:marker-style-name="T16"><text:span text:style-name="T16">CC.</text:span></text:p>
      <text:p text:style-name="P19"/>
      <text:list text:style-name="WWNum1">
        <text:list-item>
          <text:p text:style-name="P20">Office Record. </text:p>
        </text:list-item>
      </text:list>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56</meta:editing-cycles>
    <meta:editing-duration>PT3H3M51S</meta:editing-duration>
    <dc:date>2026-06-18T20:38:30.065272783</dc:date>
    <meta:generator>LibreOffice/26.2.4.2$Linux_X86_64 LibreOffice_project/c44d3140fc62714965bf5d98735e0d79ba4b1ebd</meta:generator>
    <meta:print-date>2026-05-11T15:31:55.957393221</meta:print-date>
    <meta:printed-by>PDF files</meta:printed-by>
    <meta:document-statistic meta:table-count="2" meta:image-count="2" meta:object-count="0" meta:page-count="1" meta:paragraph-count="19" meta:word-count="319" meta:character-count="2243" meta:non-whitespace-character-count="1931"/>
  </office:meta>
</office:document-meta>
</file>