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327480</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Dear concern, AL MEESAQ HIGH SCHOOL RAM GHAR MUGHAL PURA LAHORE, The Deputy Commissioner (DC) LAHORE Subject: Complaint Regarding Collection of School Fee During Summer Vacation Respected Sir/Madam, I would like to submit a complaint regarding Al Mesaq High School RAM GHAR MUGHAL PURA LAHORE. The school administration is demanding full school fees during summer vacation despite the school being closed for holidays. Many parents are facing financial difficulties, but the school management is continuously sending fee reminder messages and putting pressure on parents for payment. This situation is creating stress and disturbance for families. Additionally, parents have already raised concerns regarding the poor condition of classrooms and washrooms, but no proper improvements have been made. I kindly request the DC Office to please look into this matter and take appropriate action regarding: Fee collection during summer vacation Unnecessary pressure on parents Poor school facilities and management issues We hope the concerned authorities will provide relief to parents and ensure fair treatment. THANK YOU Regards, ZEESHAN AHMAD KHAN 0321-9498120</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