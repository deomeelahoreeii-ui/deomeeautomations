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20734</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Respected Chief Minister Punjab, Maryam Nawaz Sahiba, I would like to bring to your attention an issue affecting many parents across Punjab. Recently, schools were advised not to charge fees during school holidays, and it was stated that strict action would be taken against institutions violating these instructions. However, I have just received the fee challan forms from Lahore Grammar School, Landmark Project, requesting payment for both June and July despite the summer holidays. This is extremely disappointing and places unnecessary financial pressure on parents. If clear instructions have already been issued by the Punjab Government, then private schools should be held accountable for violating them. I request you to please take serious action against schools that are still charging fees during holidays and ensure that government directives are properly enforced. Thank you for your attention to this matter. Regards, Muhammad Rehman</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