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588044</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To the Concerned Authority, I would like to formally lodge a complaint against The Knowledge School, Ch. Fazal Campus, Faisal Town, Kanano Ferozepur Road, Lahore, as citizens have reported that the school administration is charging full fees even for holidays and issuing fee vouchers for vacation periods, while also imposing additional charges for various activities, but at the same time the basic facilities and services promised are not being properly provided to students; therefore, it is requested that this matter be investigated and action be taken to ensure fair fee practices, transparency, and proper facilities for students in accordance with regulations.</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