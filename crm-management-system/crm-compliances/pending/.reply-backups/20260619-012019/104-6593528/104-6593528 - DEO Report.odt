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9352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received a complaint regarding the issue that the complainant’s daughter is enrolled in Grade 10 at a private school located near Usman Ganj, namely The Idea School, where the complainant has alleged that, in addition to the regular monthly tuition fees, the school administration is also unlawfully demanding a separate “school fund” amounting to Rs. 10,000. The complainant has stated that a similar fund was demanded in the previous academic year for Grade 9, out of which Rs. 4,000 remained unpaid, and the school is now allegedly insisting on the clearance of the previous outstanding amount along with the newly demanded fund, in addition to the regular tuition fees. The complainant has further submitted that regular monthly fees are being paid in due course, and the additional charges being imposed have no clear justification, particularly in the case of a private educational institution. The complainant has requested the relevant department, School Education Department (Private Schools Regulation Wing), to look into the matter, verify the legality of the additional charges being imposed, take appropriate action against any violation of prescribed fee regulations, and ensure relief to the complainant in accordance with applicable rules and policy,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