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4286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ity School bahria town lahore has sent fee payment challan for 2 months. Summer vacations have already been announced and instead of not taking fee of these three summer vacations months,school has sent fres for 2 months. june fee will be paid and july fees will be paid in advance. It is injustice to take fee of summer vacations and more injustice is that giving 2 months fee in advance. An action should be taken against this school</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