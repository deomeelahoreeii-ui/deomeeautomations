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1445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I have one more request To Chief minister Maryam Nawaz sharif Kindly arrange my sister’s admission in the Maryam Nawaz Autism School or the Hamza Foundation. Her admission process has been stopped due to the certificate issu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