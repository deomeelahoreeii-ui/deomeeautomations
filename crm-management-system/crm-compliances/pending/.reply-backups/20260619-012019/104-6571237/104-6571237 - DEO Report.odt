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571237</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CHIEF MINISTER'S COMPLAINT CENTER RECEIVES A COMPLAINT TO DEPARTMENT (SCHOOL EDUCATION DEPARTMENT). A private school operating under the PEF educational system was officially declared closed by the concerned authorities a considerable time ago. However, despite the closure notification, the school administration has neither completed the required closure formalities nor submitted the relevant documents and records to the concerned department. There is also uncertainty regarding the current status and location of the school, and the required official documentation has not been provided to verify compliance with government instructions. This situation is creating confusion among parents, students, and the local community. It is requested that the concerned authorities conduct an inquiry into the matter, verify the school's operational status, ensure submission of all required records and documents, and take appropriate action against any violation of government regulations. KINDLY RESOLVE CITIZEN ISSUE AS SOON AS POSSIBLE.</text:p>
          </table:table-cell>
          <table:table-cell table:style-name="Table1.B2" office:value-type="string">
            <text:p text:style-name="P13">Respected Worthy Chief Executive Officer (DEA),</text:p>
            <text:p text:style-name="P13">The complaint forwarded from the honorable Chief Minister's CRM portal has been carefully reviewed.<text:line-break/>Upon formal evaluation and verification by the Deputy District Education Officer (M-EE), Model Town , it has been officially ascertained that the applicant's group insurance claim cannot be processed as it is legally time-barred. Official records confirm that the applicant's late father retired from service in 2011 and subsequently passed away in 2014. The initiation of this financial claim at this current stage falls well beyond the permissible statutory time limit stipulated by prevailing government regulations, rendering the initiation of further administrative proceedings impossible. <text:line-break/>Furthermore, regarding the allegations of uncooperative behavior against the clerical staff (specifically Mr. Rashid) at the DDEO office, a thorough internal review was conducted. The competent authority has categorically refuted these claims as completely baseless. It is officially reported that the applicant was appropriately guided and politely informed regarding the strict departmental rules governing time-barred cases, with absolutely no instances of misbehavior, negligence, or harassment on the part of the office staff.</text:p>
            <text:p text:style-name="P13">Since the financial claim is strictly time-barred under government regulations and the behavioral allegations have been formally investigated and proven baseless by the concerned field office, this grievance requires no further administrative intervention. The matter has been dealt with strictly in accordance with rules and policy. <text:s/><text:line-break/>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