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9283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hief Minister's Complaint Center has received a complaint regarding an issue related to education. The complainant said that he had already submitted complaints bearing Nos 5469304 and 5927663 regarding THANET HALL SCHOOL, but the matter is still unresolved. The complainant further stated that no concerned officer has contacted him so far regarding the issue. He said that due to no action on the previous complaints, his child was expelled from the school. The complainant has requested that immediate action be taken on the previous complaints, and the concerned department should contact him for resolution of the matter. The complainant has requested to look into the matter and resolve the issue, please. “Repeated complaints but no departmental response. Requesting urgent resolution.”</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