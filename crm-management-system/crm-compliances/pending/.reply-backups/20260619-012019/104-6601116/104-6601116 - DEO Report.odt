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111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ccording to the complainant, Allied School Sodiwal Campus, Sodiwal, has arranged and is conducting second-term examinations for students during the summer vacation period. The complainant states that these examinations are being held under the title of a " Summer Camp." However, instead of providing recreational or educational summer activities, the school is requiring students to appear in examination papers during their vacation. The complainant requests that the matter be investigated and appropriate action be taken to ensure that students are not subjected to examinations during their scheduled holidays under the guise of a summer camp.</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