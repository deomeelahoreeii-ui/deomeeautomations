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579534</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LAHORE GRAMMER SCHOOL Arif Jan Road is still open even after govt notification of closure of schools due to summer vacations, and they are taking exams</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