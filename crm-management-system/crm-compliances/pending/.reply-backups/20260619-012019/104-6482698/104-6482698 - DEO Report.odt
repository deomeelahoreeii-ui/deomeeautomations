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8269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o: Secretary, School Education Department, Punjab Subject: Complaint Regarding Violation of Government Notification by Opening Schools Before Official Date Respected Sir/Madam, It is respectfully submitted that according to the official notification issued by the Government of Punjab, all public and private schools are scheduled to reopen on 22 August 2026. However, some school administrations are planning to reopen schools from 10 August, which is a clear violation of the government’s official instructions and notification. This action is causing concern among students, parents, and teachers. Therefore, I request the concerned authorities to take immediate notice of this matter and take strict action against the schools violating the government orders, ensuring proper implementation of the official notification. I also request that my identity be kept completely confidential. Thank you. A Concerned Citizen</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