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90839</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o, Respected Chief Minister Punjab Miss Maryam Nawaz Punjab ■Subject: Official Complaint Against Unjustified and Illegal 22% School Fee Hike by LGS JOHAR TOWN INTERNATIONAL Lahore ■Respected Madam, ■I am writing this application to bring to your immediate attention a matter of grave concern regarding the arbitrary and unjustified increase in school fees by LGS JOHAR TIWN INTERNATIONAL BOYS CAMPUS LAHORE ■Recently, the school administration has announced a massive 22% increase in the tuition fees. This sudden and exorbitant hike is completely illegal, unjustified, and in direct violation of the government's regulations regarding private school fee structures. ■Such a heavy financial burden has been imposed without any prior notice, valid justification, or improvement in the educational facilities provided to the students. In the current economic situation, a 22% increase is highly exploitative and makes quality education unaffordable for middle-class families. ■Despite multiple concerns raised by the parents, the school administration has refused to listen. ■Therefore, I humbly request your office to take strict and immediate action against the management of LGS JOHAR TOWN INTERNATIONAL BOYS CAMPUS JOHAR TOWN LAHORE. We request you to Issue an immediate stay order against this illegal fee hike. ■Direct the school to withdraw the 22% increase and re-issue the fee vouchers as per government-approved limits. ■Conduct an official audit/inquiry into the school's fee structure. ■We hope for a swift intervention from your department to protect the future of our children and save parents from this financial exploitation. ■Thanking you in anticipation. ■Yours sincerely, ■aisha student mother 0300-8448392</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