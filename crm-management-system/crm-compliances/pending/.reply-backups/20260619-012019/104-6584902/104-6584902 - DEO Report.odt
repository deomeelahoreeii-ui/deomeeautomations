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84902</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I am lodging a formal complaint against the management of Crescent Model School, 352 – Shadman Colony, Lahore, regarding Coercive Fee Practices, Lack Of Transparency, and direct threats affecting my daughter’s academic future. My daughter, an O-Level student, appeared in Cambridge Assessment International Examination on 27 April 2026 and has been on study leave since 1 March 2026. In February 2026, the school compelled parents to pay fees up to June 2026 in advance. Under pressure and threat of withholding previous examination results, I paid April and May fees on 08 April 2026 (payment proof available). During my visit to the accounts office, an official named Zara demanded Rs. 33,600, citing an “annual increase,” without providing any fee breakdown and issuing only an informal slip. Subsequently, on 20 April 2026, students were instructed to collect their Statement of Entry/Roll Number Slip only upon proof of June fee payment. I was forced to pay again, including an unjustified Rs. 750 late fee. Upon seeking clarification and requesting a formally approved fine policy, I was first delayed and then referred to Ms. Noureen, who refused to provide any policy, behaved inappropriately, and explicitly threatened to jeopardize my daughter’s future if I escalated the matter. In total, I was compelled to pay approximately Rs. 13,350 in excess charges. The school’s conduct reflects exploitation, absence of governance, and intimidation of parents. I request immediate intervention, investigation, and strict action against the responsible officials to ensure protection of students’ rights and to prevent further victimization. The future of my daughter must not be compromised due to such unlawful practices.</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