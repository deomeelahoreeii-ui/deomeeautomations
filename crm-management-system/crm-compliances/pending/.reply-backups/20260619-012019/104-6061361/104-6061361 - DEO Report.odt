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061361</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s Complaint Center has received a complaint regarding the issue that the complainant’s daughter is due to appear in O Level examinations, and despite the month of April having been completed, the institution is demanding an excessive fee and has stated that the roll number slip will only be issued upon payment, otherwise it will be withheld, causing serious concern and distress; the complainant has requested the relevant department, School Education Department, to look into the matter and ensure fair fee practices and immediate issuance of the roll number slip, please. Roots International School DHA EME LAHORE SCHOOL NUMBER 03216699004</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