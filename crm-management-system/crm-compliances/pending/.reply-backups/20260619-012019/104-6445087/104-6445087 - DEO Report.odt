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4508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omplainant stated that Boys Elementary School, Data Nagar Badami Bagh, is allegedly charging fees in the name of summer vacation. Therefore, the complainant has requested the concerned education department to look into the matter, verify the fee collection process, and take appropriate action according to rules and regulation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