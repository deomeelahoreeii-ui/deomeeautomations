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8621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While in entire Punjab, summer vacations have been announced from May 22nd to August 23rd, on the other hand in our area, a semi trust school named Alkareem School Located in Makki Street Nawabpura Harbanspura is secretly conducting its first term exams from June 8th to June 19th. Isn't this an atrocity on children in such heat? Therefore, I request you to stop these exams asap and take strict action against them immediately. Also, keep my identity hidden.</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