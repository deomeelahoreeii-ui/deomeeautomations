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459995</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The kips school boys campous in Johar Town is planning to arrange half-book test papers during the Eid holidays after Eid vacations, even though this is not allowed during holidays.</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