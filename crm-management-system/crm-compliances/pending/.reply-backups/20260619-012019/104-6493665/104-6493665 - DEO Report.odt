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9366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Mera beta aik private school men parhta hai jiska nam hai "Al hadi foundation school" jo kay force kar raha hai jun nuly or august ki fees k liye men aik ghareeb insan hun mujhse nai afford hota k bacha school bhi nai jayga or fees bhi dun, or is school men in logon ne books or copies apni lagai hui hain bahar se koi copy ya books lene nai detay, or agar kuch kaho to kehtay hain ap apne bachay ko school se hata lain, mujhe ye batain k kia koi pochne wala nai hai bahar se copies books inhon ne lene nai deni apni books apni copies lagai hui hain or 2 class ka couse in logon ne 12000 ka diya itna mehnga course or phr alag alag taran k funds rakhay huay hain, meri help karen or is school ko warning letter jari karen or plz mujhe is fees se bachain. Men ne inke school ka May 2026 ka fee voucher attach kardiya hai, jo k men may 2026 ki fee pay karchuka hun, or jo abhi inke school ka june 2026 ka voucher aya hai wo bhi men apke sath share kardonga, ye masla buhat se logon ka hai log buhat tang hain inke extra charges se or ye jo course or copies apni detay hain or ye jun july august ki fees, mehrbani farma kar is maslay kofori hal karvain. Rafay 03054477248</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