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416304</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Pakistan studies book(in english) for 10th class students has not been issued yet . Students are suffering due to it. They have shortage of time and a very large syllabus . It is requested that kindly publish pak studies in english as soon as possible . We shall be very thankful. Please respond as soon as possible</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