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48640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Non compliance of govt orders regarding summer vacation they planning to take exams during summer voca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