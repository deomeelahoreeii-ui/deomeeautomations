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59790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Chief Minister Complaint Center received a complaint regarding the issue that a private school is illegally demanding three months of summer vacation fees in advance from parents, in direct violation of the Government of Punjab's clear rules and regulations prohibiting this practice, and the complainant has requested the relevant department, School Education Department, to look into the matter and resolve the issue,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