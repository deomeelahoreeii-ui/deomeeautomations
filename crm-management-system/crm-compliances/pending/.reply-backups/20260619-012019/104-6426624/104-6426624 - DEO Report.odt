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2662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o The Secretary, School Education Department, Government of Punjab, Lahore Subject: Request for Restoration of My Name in SIS Record at GES chak 66 NB Sargodha instead of on Disposal (Ref: Letter No. 1919 dated 12-05-2026) Respected Sir, It is respectfully submitted that reference letter No. 1919 dated 12-05-2026, issued from the office of the Chief Executive Officer (Education), District Sargodha, pertains to the deletion of my record from the School Information System (SIS) due to clerical mistake. It is respectfully stated that my SIS record was deleted due to a clerical/technical mistake at the office level. The main cause of the issue was a name similarity/confusion with another teacher having a similar name, due to which my active service record was mistakenly selected and deleted instead of the intended case. This administrative error resulted in the incorrect removal of my record from SIS. It is further submitted that I am a regular employee posted at Government Elementary School (GES) Chak 66 NB, Sargodha, and I have continuously been performing my duties without any break in service. My name was never supposed to be removed, as I have neither resigned, nor retired, nor been transferred, nor involved in any misconduct. It is also respectfully stated that the Chief Executive Officer (Education), District Sargodha, has already acknowledged and accepted this clerical mistake. A corrective letter (No. 1919 dated 12-05-2026) has been issued clearly recommending that the disposal entry may be withdrawn and my SIS record may be restored against my actual posting. However, despite clear acceptance of the error and issuance of the corrective instructions, the matter has not yet been implemented at the level of the School Education Department (Lahore), and my SIS record is still showing as a disposal case instead of an active school posting. This situation has now continued for several months and is causing serious administrative and service-related complications, including issues in service record, promotion process, and future transfer cases. Therefore, it is respectfully requested that necessary directions may kindly be issued for immediate implementation of CEO Office Letter No. 1919 dated 12-05-2026, and my disposal entry may be removed while restoring my SIS record correctly against my actual posting at GES Chak 66 NB, Sargodha. I shall remain highly grateful for your kind consideration and prompt action in this regard. Yours obediently, Muhammad Wasim PST Teacher SCHOOL name : GES chak 66 NB Sargodha EMIS code 38420141 Mobile 03038366436 CNic 38403-3267287-5 Personal No 32075333</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