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5096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o, The Honorable Chief Minister Punjab Through CM Complaint Portal Subject: Complaint Regarding Illegal Termination, Non-Payment of Salaries, Provident Fund, Mental Harassment &amp; Character Assassination Respected Sir/Madam, I, Noman Saleem Bhatti, was serving as a Biology Teacher for 9th Class at Care Channel School Kot Lakhpat. During my employment, the administration continuously subjected me to mental harassment and unfair treatment. Despite being appointed for senior classes, the management repeatedly attempted to shift me towards junior classes against my professional responsibilities and requests. I clearly requested them to allow me to continue teaching higher classes because I was already burdened with test preparation, paper checking, and other academic responsibilities. Furthermore, I was not provided with proper free lectures or sufficient academic support, which created immense mental pressure and stress. Due to this continuous mental torture and unprofessional behavior, I finally submitted a request expressing my intention to resign. However, instead of processing my resignation professionally, the administration terminated my employment immediately on the very next day. According to the institution’s own termination policy, employees are entitled to advance notice compensation equivalent to two salaries upon termination. Moreover, approximately Rs. 45,000 had been deducted from my salary under Provident Fund, which also remains unpaid. Unfortunately: My pending salaries have not been paid. My Provident Fund amount has not been returned. The termination compensation according to policy has not been given. Additionally, after my termination, the school administration allegedly encouraged students of 9th class to submit complaints against me in order to damage my reputation. I have also tried resolving this matter peacefully through communication and even through my lawyer, but the administration has refused to cooperate or respond positively. Furthermore, I serve in my locality as a Pastor and Bible Teacher at a church, and the school administration has allegedly started spreading negative statements about my character within the community in an attempt to defame me personally and professionally. This character assassination has seriously affected my reputation, dignity, and social standing. Therefore, I humbly request the concerned authorities to: Recover and ensure payment of my pending salaries . Recover and return my Provident Fund amount(45000). Ensure payment of termination compensation as per policy (90000). Take action against the mental harassment and defamatory conduct of the administration. Provide me justice according to labor laws and human rights principles. I shall be very thankful for your kind intervention and justice. Applicant: Noman Saleem Bhatti</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