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6831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 Complaint Center has received a complaint regarding an issue related to School Education. The complainant said that their children are studying at Iqra Roza Tul Atfal, which is operating as both a school and a religious institution. The complainant alleged that the institution does not observe government-notified holidays and does not follow the relevant education department policies and regulations. It is further stated that students are required to attend classes from 6:30 AM and that additional charges are collected from parents under various heads, including annual fees. The complainant has requested that the concerned authorities inspect the institution, verify compliance with government rules, and take appropriate action where violations are found. The complainant has requested to look into the matter and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