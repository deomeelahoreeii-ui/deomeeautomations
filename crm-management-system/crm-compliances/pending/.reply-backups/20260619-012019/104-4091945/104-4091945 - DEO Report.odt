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409194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is issue keeps coming up every few months and I am fed up now of highlighting it for it to be resolved. The governmnet has closed all the schools, colleges and universities, but has issued no guidelines about the evening academies that continue to run blatantly across the city. Why are schools kept at a disadvantage? Either allow schools to open, or ask the academies to move to online teaching as well. This double standard is a big cause why people are runnning away from schools and throwing their kids to academies where there is 0 emphasis on character building and moral uplifting and the students are just forced into tests and tests and tests. WE DEMAND CLARITY NOW. NO MORE DOUBLE STANDARD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