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5262882</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CM Mariyam Sahiba ny hm jaisy gareebo k lye Autisam Sachool bnwaya but waha hmary bacho ko addimission ni diya gya or na he hmy inform kiya gya plz ap hmy baten hm ny itna arsa wait kiya or end py sbi approch waly logo k bacho ko addimision diya gya hy</text:p>
          </table:table-cell>
          <table:table-cell table:style-name="Table1.B2" office:value-type="string">
            <text:p>Respected Worthy Chief Executive Officer (DEA),</text:p>
            <text:p/>
            <text:p>Reference to the complaint received through CM Complaint Portal and forwarded by your good office.</text:p>
            <text:p/>
            <text:p>It is respectfully submitted that the matter relates to admission request/grievance regarding Maryam Nawaz Autism School/Resource Centre.</text:p>
            <text:p/>
            <text:p>Since admissions in the said specialised institution are subject to prescribed SOPs, assessment, eligibility, availability of seats, and approval of the competent admission committee, the complaint may kindly be referred/marked to the competent authority i.e. Special Education Department/management of Maryam Nawaz Autism School &amp; Resource Centre for verification and further necessary action in accordance with policy.</text:p>
            <text:p/>
            <text:p>Submitted for kind perusal and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