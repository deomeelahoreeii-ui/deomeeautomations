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251810</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Dangerous building. Not a skilled staff. Very old building. Plzz check this school and take serious action .</text:p>
          </table:table-cell>
          <table:table-cell table:style-name="Table1.B2" office:value-type="string">
            <text:p>Respected Worthy Chief Executive Officer (DEA),</text:p>
            <text:p/>
            <text:p>Reference to the complaint received through CM Complaint Portal and forwarded by your good office.</text:p>
            <text:p/>
            <text:p>It is respectfully submitted that a preliminary review of the complaint has been carried out on the basis of available information. The complaint relates to alleged dangerous/old school building and unskilled staff, but complete particulars of the institution have not been provided.</text:p>
            <text:p/>
            <text:p>Student safety is of prime importance, and any dangerous building or unsafe premises is required to be dealt with strictly as per policy after identification and verification. Field formation has been sensitized to keep such matters under observation and to take appropriate steps wherever any unsafe building condition is established.</text:p>
            <text:p/>
            <text:p>As per available report/record, no school name, address, EMIS, photographs, building report, or specific staff details have been provided with the complaint. Therefore, on the basis of available record, the matter cannot be verified further. The complainant may provide complete particulars/evidence so that the matter may be proceeded in accordance with rules and policy.</text:p>
            <text:p/>
            <text:p>Submitted for kind perusal and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