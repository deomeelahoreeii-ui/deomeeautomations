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8942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he Chief Minister's Complaint Centre has received a complaint regarding non-response to two registered appeals submitted to the School Education Department. The complainant states that a review/revision appeal was submitted on 26 March 2026 to the Secretary, School Education, Mr Mudassir Riaz, and a second appeal was submitted on 20 April 2026. The registration numbers of these appeals are 1193 and 1253, respectively. The complainant further reports that despite the passage of considerable time, no response, decision, or acknowledgement has been received on either of the registered appeals, causing delay and concern regarding the disposal of the matter. Consequently, the complainant has requested the relevant authorities, including the School Education Department Punjab, to urgently review the status of appeal numbers 1193 and 1253, provide a formal response or decision, and ensure timely disposal of pending departmental appeals in accordance with rules and procedures. “*"“1NNnel Dana 4</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non-response to appeal/revision applications bearing registration Nos. 1193 and 1253 submitted before School Education Department.</text:p>
            <text:p/>
            <text:p>Since the subject pertains to appeal/diary record at School Education Department level and does not primarily fall within the field jurisdiction of District Education Authority Lahore, the complaint may kindly be referred/marked to the concerned SED appeal/diary branch for verification of status and further necessary action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