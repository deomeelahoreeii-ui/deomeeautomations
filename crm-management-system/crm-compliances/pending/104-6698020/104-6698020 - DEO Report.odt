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9802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Punjab Tianjin University of Technology se PCATP License Number na milne ki shikayat—Admission ruk gaya Mera naam Zainab Zahra hai. Main ne Punjab Tianjin University of Technology PTUT se Bachelor of Architecture ka degree session 2018-2023 me complete kiya hai. Degree ke doran humein university administration ne kaha tha ke PCATP Pakistan Council of Architects and Town Planners ka visit ho jaye ga aur hamari degree automatically attest ho jaye gi. Hum ne tamam PCATP ki requirements bhi poori karwa di thin aur degree bhi pass kar li hai. Magar afsos ke 2023 me degree complete karne ke baad bhi university ne humein ab tak PCATP license number issue nahi kiya. Is wajah se: 1. Main kisi bhi university me http://M.Arch/ higher studies ke liye admission nahi le pa rahi 2. NCA, UET aur baqi institutes PCATP attestation ke baghair admission nahi de rahe 3. Mera 5 saal ka waqt aur mehnat zaya ho rahi hai University administration se bar contact kiya lekin ab tak koi clear jawab ya timeline nahi di gayi. Ye hamaray mustaqbil ka sawal hai. Meri CM Punjab Portal se guzarish hai ke PTUT administration ko paband kiya jaye ke foran hamaray batch 2018-2023 ke tamam students ko PCATP license number issue karwaya jaye taake hum apni taleem aur career jari rakh saken. Student Details: Naam: Zainab Zahra University: Punjab Tianjin University of Technology PTUT Program: Bachelor of Architecture Session: 2018-2023 Roll No/CNIC: 35202-89-79909-4 Contact: 03071361613 Shukriya.</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Punjab Tianjin University of Technology and alleged non-issuance/recognition of PCATP license/registration number for Bachelor of Architecture session 2018-2023.</text:p>
            <text:p/>
            <text:p>Since the subject pertains to university accreditation, higher education, and PCATP recognition, it does not fall within the direct regulatory jurisdiction of District Education Authority Lahore. The complaint may kindly be referred/marked to the competent authority i.e. Higher Education Department/PTUT administration/PCATP for verification and further necessary action in accordance with rules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