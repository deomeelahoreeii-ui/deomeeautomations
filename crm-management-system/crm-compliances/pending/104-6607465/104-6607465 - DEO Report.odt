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4375in"/>
    </style:style>
    <style:style style:name="Table1.B" style:family="table-column">
      <style:table-column-properties style:column-width="4.188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746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A private school, Lahore Maktab Trust School, 20 km Ferozeour Road, Lahore (0301-8431157), instead of the Education department's instructions, is conducting regular classes for 9 and 10 classes, observing regular school timing from 8 am to 2:30 pm. They have announced a plan to continue classes till 22 June 2026. They were observing the school uniform policy, but from tomorrow, they have asked the students to come in coloured clothes. You are requested to take action against the management ASAP. Thanks</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verification of the complaint has been carried out on the basis of available information, field report, and relevant Government/School Education Department instructions. The complaint relates to Lahore Maktab Trust School, 20-KM Ferozepur Road, Lahore, regarding alleged conduct of regular classes for Grade 9 and 10 during summer vacations.</text:p>
            <text:p text:style-name="Standard"/>
            <text:p text:style-name="Standard">As per Government instructions, summer camp/academic activities during vacation period may be conducted only subject to prescribed conditions; however, participation of students shall not be compulsory and no regular classes shall be conducted in a manner causing undue pressure upon students/parents during extreme weather conditions.</text:p>
            <text:p text:style-name="Standard"/>
            <text:p text:style-name="Standard">The concerned school management has been sensitized through field formation to ensure strict compliance of Government instructions in letter and spirit, to observe notified conditions/timings, and to avoid compulsory attendance. As per available report/record, no supporting documentary evidence such as notice, timetable, attendance instruction, WhatsApp message, or photographs has been provided with the complaint. Therefore, the matter stands addressed at field level, subject to further action if documentary evidence is provided.</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13S</meta:editing-duration>
    <dc:date>2026-06-19T21:09:36.518708934</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17" meta:character-count="2236" meta:non-whitespace-character-count="1932"/>
  </office:meta>
</office:document-meta>
</file>