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7234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Honourable Chief Minister Government of the Punjab Lahore. Subject: COMPLAINT REGARDING INCONSISTENT SERVICE RECORD, ATTENDANCE STATUS AND PER ENTRIES OF MR. JAFFAR ALI (ASSISTANT BS-16), OFFICE OF DEO (M-EE), NANKANA SAHIB Respected Sir, With utmost respect, it is submitted that the undersigned seeks your kind intervention in a matter relating to serious inconsistencies and ambiguity in the official service record, attendance status, and Performance Evaluation Report (PER) of Mr. Jaffar Ali, Assistant (BS-16), Office of District Education Officer (M-EE), Nankana Sahib. It is respectfully brought to your kind notice that two official documents issued from the same office reflect contradictory and unclear administrative record, which requires immediate verification and correction in the interest of transparency, fairness, and proper maintenance of government service record: 1. Office Certificate No. 568/Admn dated 10.06.2026 issued by the District Education Officer (M-EE), Nankana Sahib states that as per attendance and office record, Mr. Jaffar Ali has not performed duty in the office since his transfer/posting/joining in July 2025. The document further mentions that a medical certificate for the period 10.11.2025 to 25.11.2025 was received, however, its regularization is still pending due to lack of verification and supporting record. 2. Performance Evaluation Report (PER) for the period 22.09.2025 to 31.12.2025 issued from the same office states that the said official did not work under the reporting officer during the period under review, and therefore no opportunity was available to assess his performance, conduct, and work output, resulting in “No Grading”. It is respectfully submitted that the above two official records collectively indicate an unclear and inconsistent depiction of the official’s actual duty status, attendance, and administrative presence during the relevant period. Such inconsistencies may lead to: • ambiguity in service record maintenance, • potential procedural irregularity in leave regularization, and • adverse implications on future service matters of the concerned official. In view of the above, it is humbly requested that your kind office may graciously direct the concerned authorities to: • conduct a thorough and impartial verification of the duty attendance and posting record of Mr. Jaffar Ali, • ensure proper regularization or clarification of the pending medical leave strictly in accordance with rules, and • rectify and harmonize the official service record to remove any inconsistency or ambiguity. It is further prayed that clear administrative guidelines may also be issued to prevent recurrence of such discrepancies in service record management in future. I shall remain highly grateful for your kind consideration and appropriate direction in this matter. Yours faithfully, JAFFAR ALI Assistant BS-16 Office of the District Education Officer (M-EE) Nankana Sahib Date: 12.06.2026</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lleged inconsistency in service record, attendance status, leave regularization, and PER entries of Mr. Jaffar Ali, Assistant (BS-16), Office of DEO (M-EE), District Nankana Sahib.</text:p>
            <text:p/>
            <text:p>Since the subject pertains to District Nankana Sahib/service record and does not fall within the direct jurisdiction of District Education Authority Lahore, the complaint may kindly be referred/marked to the competent authority i.e. CEO (DEA) Nankana Sahib/SED HR Wing for verification of service record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