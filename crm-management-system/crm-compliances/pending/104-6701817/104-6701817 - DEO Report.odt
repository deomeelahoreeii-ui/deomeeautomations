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701817</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Dear Sir/Madam, Assalam u Alaikum, I hope you are doing well. I checked my degree on the HEC portal, but the HEC attestation/stamp is not showing on my degree record. I have already uploaded and attached all the required documents for verification. Kindly review my case and update the status accordingly. My details are as follows: Name: Ali Kamran University: University of South Asia Degree: BSCS I would also like to bring to your attention that I have submitted multiple complaints regarding this issue. My latest complaint ticket number is **3542903**. Despite creating several complaints, I have not received a satisfactory response from the concerned department. Whenever I contact the department by phone, I am instructed to upload all required documents. However, I have already provided all the requested records and supporting documents multiple times. Unfortunately, the issue remains unresolved. I kindly request you to investigate this matter, review my submitted documents, and resolve the issue at the earliest possible convenience. Your assistance and prompt response will be highly appreciated. Thank you. Best Regards, Ali Kamran</text:p>
          </table:table-cell>
          <table:table-cell table:style-name="Table1.B2" office:value-type="string">
            <text:p>Respected Worthy Chief Executive Officer (DEA),</text:p>
            <text:p/>
            <text:p>Reference to the complaint received through CM Complaint Portal and forwarded by your good office.</text:p>
            <text:p/>
            <text:p>It is respectfully submitted that the matter relates to HEC degree attestation/online portal status of Ali Kamran, BSCS, University of South Asia.</text:p>
            <text:p/>
            <text:p>Since the subject pertains to Higher Education Commission/Higher Education Department/concerned university record and does not fall within the direct regulatory jurisdiction of District Education Authority Lahore, the complaint may kindly be referred/marked to the competent authority i.e. HEC/University of South Asia/Higher Education Department for verification of submitted documents and further necessary action in accordance with policy.</text:p>
            <text:p/>
            <text:p>Submitted for kind perusal and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