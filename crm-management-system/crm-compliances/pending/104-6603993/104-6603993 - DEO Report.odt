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125in"/>
    </style:style>
    <style:style style:name="Table1.B" style:family="table-column">
      <style:table-column-properties style:column-width="4.501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3993</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The Chief Minister's Complaint Center received a complaint regarding the issue that the complainant has stated that, despite the announcement regarding relief in school fees during the three-month summer vacation period, the administration of National School is continuing to charge fees from students. The complainant has requested the relevant department, School Education Department, to look into the matter, verify compliance with the applicable government directives, and take appropriate action to resolve the issue, please.</text:p>
          </table:table-cell>
          <table:table-cell table:style-name="Table1.B2" office:value-type="string">
            <text:p text:style-name="Standard">Respected Worthy Chief Executive Officer (DEA),</text:p>
            <text:p text:style-name="Standard"/>
            <text:p text:style-name="Standard">Reference to the complaint received through CM Complaint Portal and forwarded by your good office.</text:p>
            <text:p text:style-name="Standard"/>
            <text:p text:style-name="Standard">It is respectfully submitted that a preliminary review/verification of the complaint has been carried out on the basis of available information, field report, and relevant Government/School Education Department instructions. The complaint relates to National School regarding alleged collection of summer vacation fee.</text:p>
            <text:p text:style-name="Standard"/>
            <text:p text:style-name="Standard">As per policy, privately managed schools may receive regular monthly tuition fee during summer vacations; however, demand/collection of advance or lump-sum vacation fee, or pressing/harassing parents for advance payment, is not permissible. The concerned school management has been sensitized through field formation to ensure strict compliance of Government instructions in letter and spirit and to refrain from charging vacation fee in advance or through any indirect mode.</text:p>
            <text:p text:style-name="Standard"/>
            <text:p text:style-name="Standard">As per available report/record, no supporting documentary evidence such as fee voucher, receipt, written notice, WhatsApp message, or proof of advance/lump-sum demand has been provided with the complaint. Therefore, the matter stands addressed at field level; however, on provision of relevant evidence, further action may be taken in accordance with rules and policy.</text:p>
            <text:p text:style-name="Standard"/>
            <text:p text:style-name="Standard">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4M31S</meta:editing-duration>
    <dc:date>2026-06-19T21:07:46.165786500</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301" meta:character-count="2154" meta:non-whitespace-character-count="1866"/>
  </office:meta>
</office:document-meta>
</file>