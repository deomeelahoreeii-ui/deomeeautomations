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931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Complaint Remarks field is blank.</text:p>
          </table:table-cell>
          <table:table-cell table:style-name="Table1.B2" office:value-type="string">
            <text:p text:style-name="Standard">Respected Worthy Chief Executive Officer (DEA),<text:line-break/><text:line-break/>Reference to the complaint received through CM Complaint Portal and forwarded by your good office.<text:line-break/><text:line-break/>It is respectfully submitted that the <text:span text:style-name="Strong_20_Emphasis">Complaint Remarks</text:span> field in the available record of Complaint No. <text:span text:style-name="Strong_20_Emphasis">104-6609317</text:span> is blank, and no grievance, issue, institution, person, location, or other relevant particulars have been provided. Therefore, the nature of the complaint and the concerned jurisdiction cannot be ascertained from the available information.<text:line-break/><text:line-break/>In the absence of complete complaint details, no case-specific verification or further action can be undertaken at this stage. The matter may be processed further upon provision of complete complaint remarks and relevant particulars, in accordance with rules and policy.<text:line-break/><text:line-break/>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21S</meta:editing-duration>
    <dc:date>2026-07-14T09:26:58.939732134</dc:date>
    <meta:generator>LibreOffice/26.2.4.2$Linux_X86_64 LibreOffice_project/64a984c51f4702dbd3710b13428c673a2f1292e7</meta:generator>
    <meta:print-date>2026-05-11T15:31:55.957393221</meta:print-date>
    <meta:printed-by>PDF files</meta:printed-by>
    <meta:document-statistic meta:table-count="2" meta:image-count="2" meta:object-count="0" meta:page-count="1" meta:paragraph-count="17" meta:word-count="160" meta:character-count="1128" meta:non-whitespace-character-count="972"/>
  </office:meta>
</office:document-meta>
</file>