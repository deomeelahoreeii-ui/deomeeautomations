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4.3493in"/>
    </style:style>
    <style:style style:name="Table1.B" style:family="table-column">
      <style:table-column-properties style:column-width="3.277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able_20_Contents">
      <style:paragraph-properties fo:text-align="left" style:justify-single-word="false"/>
      <style:text-properties fo:font-size="10pt" style:font-size-asian="10pt" style:font-size-complex="10pt"/>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style:font-family-complex="'Noto Sans Devanagari'"/>
    </style:style>
    <style:style style:name="T15" style:family="text">
      <style:text-properties fo:font-family="'Noto Sans Devanagari'"/>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9311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ext:span text:style-name="T14">درخواست برائے داخلہ</text:span><text:span text:style-name="T15"><text:line-break/></text:span><text:span text:style-name="T14">برائے خصوصی بچوں کے تعلیمی و تربیتی مرکز</text:span><text:span text:style-name="T15"><text:line-break/></text:span><text:span text:style-name="T14">محترمہ</text:span><text:span text:style-name="T15"><text:line-break/></text:span><text:span text:style-name="T14">وزیراعلیٰ پنجاب، مریم نواز صاحبہ</text:span><text:span text:style-name="T15"><text:line-break/>(</text:span><text:span text:style-name="T14">برائے توجہ</text:span><text:span text:style-name="T15">: Maryam Nawaz Autism &amp; Resource Center)<text:line-break/></text:span><text:span text:style-name="T14">محترمہ السلام علیکم</text:span><text:span text:style-name="T15">!<text:line-break/></text:span><text:span text:style-name="T14">مؤدبانہ گزارش ہے کہ آپ کی جانب سے خصوصی بچوں کے لیے شروع کیا گیا قابلِ تحسین اقدام </text:span><text:span text:style-name="T15">Maryam Nawaz Autism &amp; Resource Center </text:span><text:span text:style-name="T14">خصوصی بچوں اور ان کے والدین کے لیے امید کی ایک عظیم مثال ہے۔ اس فلاحی منصوبے پر ہم آپ کے بے حد شکر گزار ہیں۔</text:span><text:span text:style-name="T15"><text:line-break/></text:span><text:span text:style-name="T14">محترمہ، عرض یہ ہے کہ میرے تین بچے</text:span><text:span text:style-name="T15">:<text:line-break/></text:span><text:span text:style-name="T14">عرفان عباس</text:span><text:span text:style-name="T15"><text:line-break/></text:span><text:span text:style-name="T14">ایمن</text:span><text:span text:style-name="T15"><text:line-break/></text:span><text:span text:style-name="T14">حورین</text:span><text:span text:style-name="T15"><text:line-break/></text:span><text:span text:style-name="T14">خصوصی ضروریات کے حامل ہیں۔ ان میں </text:span><text:span text:style-name="T15">Autism Spectrum Disorder </text:span><text:span text:style-name="T14">جبکہ ایک بچے کو </text:span><text:span text:style-name="T15">Lissencephaly </text:span><text:span text:style-name="T14">جیسی سنگین نیورولوجیکل بیماری لاحق ہے۔ ہم والدین اپنی محدود استطاعت کے باعث اپنے بچوں کو وہ معیاری تعلیم، تھراپی اور خصوصی نگہداشت فراہم کرنے سے قاصر ہیں جس کے وہ حقدار ہیں۔</text:span><text:span text:style-name="T15"><text:line-break/></text:span><text:span text:style-name="T14">آپ کے قائم کردہ ادارے میں موجود خصوصی تعلیم، اسپیچ تھراپی، اوکیوپیشنل تھراپی اور ماہر عملہ ہمارے بچوں کے بہتر مستقبل کے لیے نہایت ضروری ہے۔</text:span><text:span text:style-name="T15"><text:line-break/></text:span><text:span text:style-name="T14">لہٰذا آپ سے نہایت عاجزانہ اور پُرخلوص درخواست ہے کہ میرے تینوں بچوں کو </text:span><text:span text:style-name="T15">Maryam Nawaz Autism &amp; Resource Center </text:span><text:span text:style-name="T14">میں داخلہ مرحمت فرمایا جائے تاکہ وہ بہتر تربیت، خود اعتمادی اور باوقار زندگی کی طرف گامزن ہو سکیں۔</text:span><text:span text:style-name="T15"><text:line-break/></text:span><text:span text:style-name="T14">ہم دل سے آپ کے اس عظیم فلاحی مشن کے لیے دعاگو ہیں اور امید رکھتے ہیں کہ آپ ہمارے بچوں کے مستقبل پر خصوصی توجہ فرمائیں گی۔</text:span><text:span text:style-name="T15"><text:line-break/></text:span><text:span text:style-name="T14">اللہ تعالیٰ آپ کو مزید خدمتِ خلق کی توفیق عطا فرمائے۔</text:span><text:span text:style-name="T15"><text:line-break/></text:span><text:span text:style-name="T14">والسلام</text:span><text:span text:style-name="T15"><text:line-break/></text:span><text:span text:style-name="T14">خاکسار</text:span><text:span text:style-name="T15"><text:line-break/></text:span><text:span text:style-name="T14">نام</text:span><text:span text:style-name="T15">: </text:span><text:span text:style-name="T14">خواجہ محمد طاہر عباس</text:span><text:span text:style-name="T15"><text:line-break/>CNIC: 32102-5372288-9<text:line-break/></text:span><text:span text:style-name="T14">رابطہ نمبر</text:span><text:span text:style-name="T15">: 03356163060</text:span></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the matter relates to request for admission of three special children in Maryam Nawaz Autism &amp; Resource Center.</text:p>
            <text:p text:style-name="Standard"/>
            <text:p text:style-name="Standard">Since admissions in the specialised centre are subject to medical/psychological assessment, prescribed SOPs, eligibility criteria, availability of seats, and approval of the competent admission committee, the complaint may kindly be referred/marked to the competent authority i.e. Special Education Department/management of Maryam Nawaz Autism &amp; Resource Center for verification and further necessary action in accordance with policy.</text:p>
            <text:p text:style-name="Standard"/>
            <text:p text:style-name="Standard">Submitted for kind perusal and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4" loext:marker-style-name="T16"/>
      <text:p text:style-name="P15" loext:marker-style-name="T16"/>
      <text:p text:style-name="P16" loext:marker-style-name="T17"/>
      <text:p text:style-name="P16" loext:marker-style-name="T17"/>
      <text:p text:style-name="P16" loext:marker-style-name="T17"/>
      <text:p text:style-name="P17" loext:marker-style-name="T17"><text:span text:style-name="T17">DISTRICT EDUCATION OFFICER (M-EE)</text:span></text:p>
      <text:p text:style-name="P17" loext:marker-style-name="T17"><text:span text:style-name="T17">LAHORE</text:span></text:p>
      <text:p text:style-name="P7" loext:marker-style-name="T17"><text:span text:style-name="T17">CC.</text:span></text:p>
      <text:p text:style-name="P18"/>
      <text:list text:style-name="WWNum1">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4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5M21S</meta:editing-duration>
    <dc:date>2026-06-19T20:02:24.544754690</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1" meta:word-count="398" meta:character-count="2370" meta:non-whitespace-character-count="1984"/>
  </office:meta>
</office:document-meta>
</file>