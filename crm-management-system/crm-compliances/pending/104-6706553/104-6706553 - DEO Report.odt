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70655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Respected Sir/Madam, I would like to bring to your notice a serious issue regarding suspected fake invoices and financial irregularities in school titled 'Fateh Jang Becon Home School' under the supervision of the principal named Rehana Yasmeen Akhtar under cell number 03035564823. It has come to my attention that certain invoices/bills appear to be fake or manipulated to extort exorbitant fund of money from innocent parents. This matter should be properly investigated to ensure transparency and fairness. In my case I was given tuition fee cost of Rs 25000/- per month per kid. However, this tuition fee doesnt justifies the level of education and facilities provided by the school. Majority of schools in the nearby area only charge Rs 2000/- to Rs 3000/- in tuition. I request the concerned department(s) to kindly conduct an inquiry into this issue and take appropriate action according to the rules if any misconduct is proven and give strict punishment to avoid such fraudulent activities from the principal and associated staff in the future. I hope this complaint will be treated seriously, confidentially and on priority basis.</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Fateh Jang Becon Home School, District Attock, regarding alleged fake/manipulated invoices, excessive fee demand, and financial irregularities.</text:p>
            <text:p/>
            <text:p>Since the subject pertains to District Attock and does not fall within the direct regulatory jurisdiction of District Education Authority Lahore, the complaint may kindly be referred/marked to the competent authority i.e. CEO (DEA) Attock/concerned registering authority for verification of school record, fee vouchers,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