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text-align="justify" style:justify-single-word="false" fo:orphans="0" fo:widows="0"/>
      <style:text-properties style:font-name="Google Sans Text" fo:font-size="9pt" fo:font-weight="normal" officeooo:paragraph-rsid="005323e3" style:font-size-asian="9pt" style:font-weight-asian="normal" style:font-size-complex="9pt" style:font-weight-complex="normal"/>
    </style:style>
    <style:style style:name="P13" style:family="paragraph" style:parent-style-name="Text_20_body">
      <style:paragraph-properties fo:text-align="justify" style:justify-single-word="false" fo:orphans="0" fo:widows="0"/>
      <style:text-properties style:font-name="Google Sans Text" fo:font-size="9pt" style:font-size-asian="9pt" style:font-size-complex="9pt"/>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548399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The citizen states that this complaint has been submitted to the Chief Minister’s Complaint Center regarding serious misconduct, harassment, and violation of due process by officials of the Punjab Examination Commission. The citizen has been serving as a teacher at Punjab Group of Colleges since 2014 and was later selected by the Punjab Examination Commission, Wahdat Road, as a Subject Specialist. Following this selection, the citizen was called for an interview for the position of item writer. During the interview, the citizen was not only threatened for proposing difficult and standard-based questions but was also subjected to harassment and undue pressure, and was forcibly made to leave. Subsequently, punitive actions were taken against the citizen without any formal justification.The citizen further states that according to the law, if any complaint is made against a government employee, the concerned individual must be formally informed in writing and given an opportunity to respond. However, in this case, no written notice was ever provided, and instead, the citizen was subjected to intimidation and unlawful treatment. The citizen lodged complaints with the Secretary Education aswell as the then Chief Minister, but no action or response was received from the concerned departments.This matterreflects a serious violation of transparency, merit, and legal procedure, and has caused significant professional and mentaldistress to the citizen. The citizen strongly requests the Chief Minister’s Complaint Center to take immediate notice of thisissue, initiate a fair and transparent inquiry, hold the responsible officials accountable, and ensure justice is providedwithout further delay.</text:p>
          </table:table-cell>
          <table:table-cell table:style-name="Table1.B2" office:value-type="string">
            <text:p text:style-name="P12">Respected Worthy Chief Executive Officer (DEA),</text:p>
            <text:p text:style-name="P13">Reference to the complaint received through CM Complaint Portal and forwarded by your good office.</text:p>
            <text:p text:style-name="P13">It is respectfully submitted that the matter relates to alleged misconduct, harassment, and violation of due process during selection/interview proceedings at Punjab Examination Commission, Wahdat Road, Lahore.</text:p>
            <text:p text:style-name="P13">Since the subject pertains to internal administrative/selection proceedings of Punjab Examination Commission and does not fall within the direct regulatory jurisdiction of District Education Authority Lahore, the complaint may kindly be referred/marked to the competent authority i.e. Punjab Examination Commission/School Education Department, Government of the Punjab, for examination of record and further necessary action in accordance with rules and policy.</text:p>
            <text:p text:style-name="P13">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45M43S</meta:editing-duration>
    <dc:date>2026-06-19T20:46:01.877958034</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1" meta:word-count="402" meta:character-count="2845" meta:non-whitespace-character-count="2455"/>
  </office:meta>
</office:document-meta>
</file>