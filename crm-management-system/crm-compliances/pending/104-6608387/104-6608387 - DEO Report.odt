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5007in"/>
    </style:style>
    <style:style style:name="Table1.B" style:family="table-column">
      <style:table-column-properties style:column-width="4.125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838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citizen say that I would like to file a complaint against American Lyceum School regarding the collection of fees during the summer vacation period. My children are students at this school. The administration is demanding full fees for the three months of summer holidays. They are also stating that if the fees are not paid, they will not provide the summer vacation homework to the students. This practice is unfair and places an unnecessary financial burden on parents. As per government directives, there should be no fee charged for the summer vacation period. Linking the provision of educational work with fee payment is also inappropriate. I kindly request the concerned authorities to take strict action against this matter and ensure that schools follow the proper rules and regulations.</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a preliminary review/verification of the complaint has been carried out on the basis of available information, field report, and relevant Government/School Education Department instructions. The complaint relates to American Lyceum School regarding alleged demand of full three months’ summer vacation fee and linking of summer vacation homework with fee payment.</text:p>
            <text:p text:style-name="Standard"/>
            <text:p text:style-name="Standard">As per policy, privately managed schools may receive regular monthly tuition fee during summer vacations; however, demand/collection of advance or lump-sum vacation fee, or creating undue pressure upon students/parents for advance payment, is not permissible. Summer vacation work/assignments should also not be withheld as a pressure tactic for disputed or advance dues.</text:p>
            <text:p text:style-name="Standard"/>
            <text:p text:style-name="Standard">The concerned school management has been sensitized through field formation to ensure strict compliance of Government instructions in letter and spirit. As per available report/record, no supporting documentary evidence such as fee voucher, written notice, WhatsApp message, receipt, or proof of withholding homework has been provided with the complaint. Therefore, the matter stands addressed at field level; however, on provision of relevant evidence, further action may be taken in accordance with rules and policy.</text:p>
            <text:p text:style-name="Standard"/>
            <text:p text:style-name="Standard">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M10S</meta:editing-duration>
    <dc:date>2026-06-19T21:11:57.750802149</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374" meta:character-count="2546" meta:non-whitespace-character-count="2185"/>
  </office:meta>
</office:document-meta>
</file>