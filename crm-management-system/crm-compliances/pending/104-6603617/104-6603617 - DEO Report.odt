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3.7875in"/>
    </style:style>
    <style:style style:name="Table1.B" style:family="table-column">
      <style:table-column-properties style:column-width="3.8389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3d9c8e"/>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57ee17"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510/PMDU</text:span><text:span text:style-name="T6">/</text:span><text:span text:style-name="T7">CRM</text:span></text:p>
            <text:p text:style-name="P5" loext:marker-style-name="T3"><text:span text:style-name="T8">Dated </text:span><text:span text:style-name="T5">17</text:span><text:span text:style-name="T8">/0</text:span><text:span text:style-name="T9">6</text:span><text:span text:style-name="T8">/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0361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Standard">To The Chief Minister Punjab Subject: Complaint Regarding Non-Payment of Salary and Security Deposit Respected Madam, I am writing to formally lodge a complaint against the administration of my campus regarding the non-payment of my salary and security deposit. I have been serving as an English Teacher at The Smart School Gulshan E Ravi Campus for the past three and half years and have fulfilled my duties responsibly and professionally. However, despite repeated requests, my salary for the last month has not been released. In addition, my security deposit amounting to Rs. 25,000 has also not been returned. I have approached the school administration and head offices several times to resolve this matter, but no satisfactory response has been provided. The unnecessary delay in releasing my dues has caused me financial hardship and considerable stress. I respectfully request you to investigate this matter and ensure the immediate payment of my pending salary and the return of my security deposit. I would appreciate your prompt intervention and a fair resolution of this issue.Thank you for your attention and cooperation. Your's Sincerely, Faiza Saeed CNIC# 3740589190732 Dated:04-06-26</text:p>
          </table:table-cell>
          <table:table-cell table:style-name="Table1.B2" office:value-type="string">
            <text:p text:style-name="Standard">Respected Worthy Chief Executive Officer (DEA),</text:p>
            <text:p text:style-name="Standard"/>
            <text:p text:style-name="Standard">Reference to the complaint received through CM Complaint Portal and forwarded by your good office.</text:p>
            <text:p text:style-name="Standard"/>
            <text:p text:style-name="Standard">It is respectfully submitted that a preliminary review of the complaint has been carried out on the basis of available information. The matter relates to an employment/service dispute of a private school teacher of The Smart School, Gulshan-e-Ravi Campus, regarding alleged non-payment of salary and return of security deposit.</text:p>
            <text:p text:style-name="Standard"/>
            <text:p text:style-name="Standard">The school management has been sensitized through field formation to settle any admitted/lawful dues as per record and to avoid unnecessary delay or harassment. However, recovery of salary/security deposit and employment-related claims primarily fall within the domain of the competent Labour/contractual forum.</text:p>
            <text:p text:style-name="Standard"/>
            <text:p text:style-name="Standard">As per available report/record, no supporting documentary evidence such as appointment letter, salary slip, attendance record, security deposit receipt, resignation/termination record, or written demand has been provided with the complaint. Therefore, the complainant may be advised to approach the competent Labour Department/forum with complete record, while the matter stands addressed at field level on available information.</text:p>
            <text:p text:style-name="Standard"/>
            <text:p text:style-name="Standard">Submitted for kind perusal and further necessary action, please.</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3" loext:marker-style-name="T15"/>
      <text:p text:style-name="P14" loext:marker-style-name="T15"/>
      <text:p text:style-name="P15" loext:marker-style-name="T16"/>
      <text:p text:style-name="P15" loext:marker-style-name="T16"/>
      <text:p text:style-name="P15" loext:marker-style-name="T16"/>
      <text:p text:style-name="P16" loext:marker-style-name="T16"><text:span text:style-name="T16">DISTRICT EDUCATION OFFICER (M-EE)</text:span></text:p>
      <text:p text:style-name="P16" loext:marker-style-name="T16"><text:span text:style-name="T16">LAHORE</text:span></text:p>
      <text:p text:style-name="P7" loext:marker-style-name="T16"><text:span text:style-name="T16">CC.</text:span></text:p>
      <text:p text:style-name="P17"/>
      <text:list text:style-name="WWNum1">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7</meta:editing-cycles>
    <meta:editing-duration>PT3H4M36S</meta:editing-duration>
    <dc:date>2026-06-19T21:06:32.498831925</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22" meta:word-count="397" meta:character-count="2729" meta:non-whitespace-character-count="2345"/>
  </office:meta>
</office:document-meta>
</file>