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3165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he complainant, Mr. Faisal, is seeking the group insurance claim for his late father, a former BPS-12 teacher who retired in 2011 and passed away in 2014. He alleges that the DDEO office staff, specifically a clerk named Mr. Rashid, refused to listen to him, did not process his application, and dismissed his claim of eligibility.</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