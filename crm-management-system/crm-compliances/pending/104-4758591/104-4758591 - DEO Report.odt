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draw="urn:oasis:names:tc:opendocument:xmlns:drawing:1.0" xmlns:fo="urn:oasis:names:tc:opendocument:xmlns:xsl-fo-compatible:1.0" xmlns:ns5="urn:org:documentfoundation:names:experimental:office:xmlns:loext:1.0" xmlns:ns6="http://openoffice.org/2009/office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ns6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ns6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ns6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ns6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ns6:paragraph-rsid="001c8166"/>
    </style:style>
    <style:style style:name="P8" style:family="paragraph" style:parent-style-name="Standard_20__28_WW_29_">
      <style:text-properties fo:color="#000000" ns5:opacity="100%" style:font-name="Bookman Old Style" fo:font-weight="bold" ns6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ns5:opacity="100%" style:font-name="Bookman Old Style" fo:font-weight="bold" ns6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ns6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ns6:rsid="001d93e2" ns6:paragraph-rsid="001d93e2" style:font-weight-asian="bold" style:font-weight-complex="bold"/>
    </style:style>
    <style:style style:name="P12" style:family="paragraph" style:parent-style-name="Text_20_body">
      <style:paragraph-properties fo:margin-left="0in" fo:text-align="justify" style:justify-single-word="false" fo:text-indent="0in" style:auto-text-indent="false"/>
      <style:text-properties fo:font-size="10pt" ns6:paragraph-rsid="00413ba8" style:font-size-asian="10pt" style:font-size-complex="10pt"/>
    </style:style>
    <style:style style:name="P13" style:family="paragraph" style:parent-style-name="Text_20_body">
      <style:paragraph-properties fo:text-align="justify" style:justify-single-word="false" fo:orphans="0" fo:widows="0"/>
      <style:text-properties style:font-name="Google Sans Text" fo:font-size="9pt" fo:font-weight="normal" ns6:paragraph-rsid="005323e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ns6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5" style:family="paragraph" style:parent-style-name="Standard_20__28_WW_29_">
      <style:paragraph-properties fo:text-align="justify" style:justify-single-word="false" fo:text-indent="0.5in" style:auto-text-indent="false" ns5:word-spacing-minimum="75%" ns5:word-spacing-maximum="133%"/>
      <style:text-properties fo:color="#000000" ns5:opacity="100%" style:font-name="Bookman Old Style" ns6:paragraph-rsid="001c8166"/>
    </style:style>
    <style:style style:name="P16" style:family="paragraph" style:parent-style-name="Standard_20__28_WW_29_">
      <style:paragraph-properties fo:text-align="justify" style:justify-single-word="false" ns5:word-spacing-minimum="75%" ns5:word-spacing-maximum="133%"/>
      <style:text-properties fo:color="#000000" ns5:opacity="100%" style:font-name="Bookman Old Style" ns6:paragraph-rsid="001c8166"/>
    </style:style>
    <style:style style:name="P17" style:family="paragraph" style:parent-style-name="Standard_20__28_WW_29_">
      <style:paragraph-properties fo:margin-left="3in" fo:text-align="center" style:justify-single-word="false"/>
      <style:text-properties fo:color="#000000" ns5:opacity="100%" style:font-name="Bookman Old Style" fo:font-weight="bold" ns6:paragraph-rsid="001c8166" style:font-weight-asian="bold"/>
    </style:style>
    <style:style style:name="P18" style:family="paragraph" style:parent-style-name="Standard_20__28_WW_29_">
      <style:paragraph-properties fo:margin-left="3in" fo:text-align="center" style:justify-single-word="false"/>
      <style:text-properties ns6:paragraph-rsid="003d9c8e"/>
    </style:style>
    <style:style style:name="P19" style:family="paragraph" style:parent-style-name="List_20_Paragraph">
      <style:paragraph-properties fo:margin-left="0in"/>
      <style:text-properties ns6:paragraph-rsid="001c8166"/>
    </style:style>
    <style:style style:name="P20" style:family="paragraph" style:parent-style-name="List_20_Paragraph" style:list-style-name="WWNum1">
      <style:paragraph-properties fo:margin-top="0in" fo:margin-bottom="0.111in" style:contextual-spacing="true"/>
      <style:text-properties fo:color="#000000" ns5:opacity="100%" style:font-name="Bookman Old Style" ns6:paragraph-rsid="001c8166"/>
    </style:style>
    <style:style style:name="P21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ns5:opacity="100%" style:font-name="Bookman Old Style" ns6:rsid="003bb5e8" ns6:paragraph-rsid="003bb5e8"/>
    </style:style>
    <style:style style:name="T1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ns6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ns6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ns6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ns6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ns6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ns5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ns6:rsid="003fa767"/>
    </style:style>
    <style:style style:name="T12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ns5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5" style:family="text">
      <style:text-properties fo:color="#000000" ns5:opacity="100%" style:font-name="Bookman Old Style"/>
    </style:style>
    <style:style style:name="T16" style:family="text">
      <style:text-properties fo:color="#000000" ns5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ns5:allow-overlap="true" ns5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ns5:allow-overlap="true" ns5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ns5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ns5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ns5:marker-style-name="T3"><text:span text:style-name="T4">OFFICE OF THE</text:span></text:p>
            <text:p text:style-name="P4" ns5:marker-style-name="T3"><text:span text:style-name="T4">DISTRICT EDUCATION OFFICER (M-EE)</text:span></text:p>
            <text:p text:style-name="P4" ns5:marker-style-name="T4"><text:span text:style-name="T4">LAHORE</text:span></text:p>
            <text:p text:style-name="P5" ns5:marker-style-name="T4"><text:span text:style-name="T4">No. </text:span><text:span text:style-name="T5">1510/PMDU</text:span><text:span text:style-name="T6">/</text:span><text:span text:style-name="T7">CRM</text:span></text:p>
            <text:p text:style-name="P5" ns5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ns5:marker-style-name="T1"><text:span text:style-name="Strong_20_Emphasis"><text:span text:style-name="T1"/></text:span></text:p>
      <text:p text:style-name="P7" ns5:marker-style-name="T10"><text:span text:style-name="T10">To: <text:tab/><text:tab/></text:span></text:p>
      <text:p text:style-name="P8" ns5:marker-style-name="T10"><text:tab/><text:tab/><text:span text:style-name="T11">The </text:span>Chief Executive Officer (DEA), </text:p>
      <text:p text:style-name="P8" ns5:marker-style-name="T10"><text:tab/><text:tab/>Lahore</text:p>
      <text:p text:style-name="P9" ns5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4758591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>My daughter got admission in phase 2 of Maryam Nawaz School for Autism and Resource center which is a great initiative as my daughter is autistic. The phase 1 began in February and it was said the phase 2 would begin in 4 weeks and a number was given for updates which don't pick and neither replies on WhatsApp. I have to plan the therapies of my daughter if given a clear date and plan. This is not a complaint just a pointing</text:p>
          </table:table-cell>
          <table:table-cell table:style-name="Table1.B2" office:value-type="string">
            <text:p>Respected Worthy Chief Executive Officer (DEA),</text:p>
            <text:p/>
            <text:p>Reference to the complaint received through CM Complaint Portal and forwarded by your good office.</text:p>
            <text:p/>
            <text:p>It is respectfully submitted that the matter relates to update/schedule of Phase-II admission/commencement at Maryam Nawaz School &amp; Resource Centre for Autism and non-response on the provided contact number.</text:p>
            <text:p/>
            <text:p>Since the subject pertains to a specialised autism/resource centre and its admission/operation schedule, the complaint may kindly be referred/marked to the competent authority i.e. Special Education Department/management of Maryam Nawaz School &amp; Resource Centre for Autism for guidance to the parent and further necessary action in accordance with policy.</text:p>
            <text:p/>
            <text:p>Submitted for kind perusal and further necessary action, please.</text:p>
          </table:table-cell>
        </table:table-row>
      </table:table>
      <text:p text:style-name="P14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4"/></text:span></text:p>
      <text:p text:style-name="P15" ns5:marker-style-name="T15"/>
      <text:p text:style-name="P16" ns5:marker-style-name="T15"/>
      <text:p text:style-name="P17" ns5:marker-style-name="T16"/>
      <text:p text:style-name="P17" ns5:marker-style-name="T16"/>
      <text:p text:style-name="P17" ns5:marker-style-name="T16"/>
      <text:p text:style-name="P18" ns5:marker-style-name="T16"><text:span text:style-name="T16">DISTRICT EDUCATION OFFICER (M-EE)</text:span></text:p>
      <text:p text:style-name="P18" ns5:marker-style-name="T16"><text:span text:style-name="T16">LAHORE</text:span></text:p>
      <text:p text:style-name="P7" ns5:marker-style-name="T16"><text:span text:style-name="T16">CC.</text:span></text:p>
      <text:p text:style-name="P19"/>
      <text:list text:style-name="WWNum1">
        <text:list-item>
          <text:p text:style-name="P20">Office Record. 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6</meta:editing-cycles>
    <meta:editing-duration>PT3H3M51S</meta:editing-duration>
    <dc:date>2026-06-18T20:38:30.065272783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19" meta:word-count="319" meta:character-count="2243" meta:non-whitespace-character-count="1931"/>
  </office:meta>
</office:document-meta>
</file>