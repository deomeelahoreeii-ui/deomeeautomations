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able_20_Contents">
      <style:paragraph-properties fo:text-align="left" style:justify-single-word="false"/>
      <style:text-properties fo:font-size="9pt" style:font-size-asian="9pt" style:font-size-complex="9pt"/>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style:font-family-complex="'Noto Sans Devanagari'"/>
    </style:style>
    <style:style style:name="T15" style:family="text">
      <style:text-properties fo:font-family="'Noto Sans Devanagari'"/>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0575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ext:span text:style-name="T14">موضوع</text:span><text:span text:style-name="T15">: </text:span><text:span text:style-name="T14">میٹرک و انٹر کے نتائج کا جلد از جلد اعلان کرنے اور دیگر صوبائی بورڈز کی طرز پر شیڈول جاری کرنے کے لیے پنجاب بھر کے طلبہ کا مشترکہ محضر نامہ</text:span><text:span text:style-name="T15"><text:line-break/></text:span><text:span text:style-name="T14">بخدمت مآب</text:span><text:span text:style-name="T15">:<text:line-break/></text:span><text:span text:style-name="T14">جناب رانا سکندر حیات خان صاحب </text:span><text:span text:style-name="T15">(</text:span><text:span text:style-name="T14">معزز صوبائی وزیرِ تعلیم، پنجاب</text:span><text:span text:style-name="T15">)<text:line-break/></text:span><text:span text:style-name="T14">جناب چیئرمین صاحب </text:span><text:span text:style-name="T15">(</text:span><text:span text:style-name="T14">پنجاب بورڈز کمیٹی آف چیئرمینز </text:span><text:span text:style-name="T15">- PBCC)<text:line-break/></text:span><text:span text:style-name="T14">جنابِ عالی،</text:span><text:span text:style-name="T15"><text:line-break/></text:span><text:span text:style-name="T14">نہایت احترام کے ساتھ پنجاب بھر کے لاکھوں طلبہ و طالبات اور والدین کی جانب سے یہ ہنگامی درخواست آپ کے گوش گزار کرنی ہے۔ جیسا کہ آپ کے علم میں ہے کہ اس سال میٹرک اور انٹرمیڈیٹ </text:span><text:span text:style-name="T15">(</text:span><text:span text:style-name="T14">نہم، دہم، گیارہویں، بارہویں</text:span><text:span text:style-name="T15">) </text:span><text:span text:style-name="T14">کا سلیبس مکمل طور پر نیا اور ایس ایل او </text:span><text:span text:style-name="T15">(SLO) </text:span><text:span text:style-name="T14">بیسڈ تھا، جس کی وجہ سے طلبہ پہلے ہی شدید ذہنی دباؤ اور محنت کے عمل سے گزرے ہیں۔ اب امتحانات کے بعد نتائج کا طویل انتظار طلبہ کے اگلے تعلیمی سال اور یونیورسٹیوں کے داخلوں کو شدید متاثر کر رہا ہے۔</text:span><text:span text:style-name="T15"><text:line-break/></text:span><text:span text:style-name="T14">بنیادی حقائق اور ہمارے مطالبات</text:span><text:span text:style-name="T15">:<text:line-break/></text:span><text:span text:style-name="T14">دیگر بورڈز کی تیز رفتار کارکردگی</text:span><text:span text:style-name="T15">: </text:span><text:span text:style-name="T14">فیڈرل بورڈ </text:span><text:span text:style-name="T15">(FBISE) </text:span><text:span text:style-name="T14">اور سندھ کے تعلیمی بورڈز ہمیشہ امتحانات کے فوراً بعد انتہائی تیز رفتاری سے نتائج کا اعلان کر دیتے ہیں، جس سے وہاں کے طلبہ کو اگلی کلاسز اور یونیورسٹیوں میں داخلے کے لیے پورا وقت مل جاتا ہے۔ پنجاب کے تعلیمی بورڈز کو بھی اسی جدید اور تیز رفتار طرز پر کام کرنے کی اشد ضرورت ہے۔</text:span><text:span text:style-name="T15"><text:line-break/></text:span><text:span text:style-name="T14">نتائج کا مطلوبہ ٹائم لائن شیڈول</text:span><text:span text:style-name="T15">: </text:span><text:span text:style-name="T14">پنجاب کے تمام طلبہ و طالبات کا متفقہ مطالبہ ہے کہ نتائج کو روایتی تاخیر سے بچا کر درج ذیل شیڈول کے مطابق جاری کیا جائے</text:span><text:span text:style-name="T15">:<text:line-break/></text:span><text:span text:style-name="T14">دہم کلاس </text:span><text:span text:style-name="T15">(Matric Part-II): </text:span><text:span text:style-name="T14">جولائی کے دوسرے ہفتے تک۔</text:span><text:span text:style-name="T15"><text:line-break/></text:span><text:span text:style-name="T14">نہم کلاس </text:span><text:span text:style-name="T15">(Matric Part-I): </text:span><text:span text:style-name="T14">جولائی کے آخری ہفتے تک۔</text:span><text:span text:style-name="T15"><text:line-break/></text:span><text:span text:style-name="T14">بارہویں کلاس </text:span><text:span text:style-name="T15">(Inter Part-II): </text:span><text:span text:style-name="T14">اگست کے دوسرے ہفتے تک۔</text:span><text:span text:style-name="T15"><text:line-break/></text:span><text:span text:style-name="T14">گیارہویں کلاس </text:span><text:span text:style-name="T15">(Inter Part-I): </text:span><text:span text:style-name="T14">اگست کے آخری ہفتے تک۔</text:span><text:span text:style-name="T15"><text:line-break/></text:span><text:span text:style-name="T14">نئے سلیبس کا دباؤ اور تعلیمی سال کا ضیاع</text:span><text:span text:style-name="T15">: </text:span><text:span text:style-name="T14">سلیبس مکمل طور پر نیا ہونے کی وجہ سے طلبہ کو اگلی کلاسز کی تیاری کے لیے زیادہ وقت درکار ہے۔ اگر نتائج ستمبر یا اکتوبر تک لٹکائے گئے، تو یونیورسٹیوں کے داخلے بند ہو جائیں گے اور غریب والدین اور ہونہار طلبہ کا پورا سال برباد ہو جائے گا۔</text:span><text:span text:style-name="T15"><text:line-break/></text:span><text:span text:style-name="T14">ہماری مؤدبانہ استدعا</text:span><text:span text:style-name="T15">:<text:line-break/></text:span><text:span text:style-name="T14">آپ سے گزارش ہے کہ پنجاب بھر کے طلبہ کے مستقبل پر رحم کھاتے ہوئے تمام تعلیمی بورڈز </text:span><text:span text:style-name="T15">(</text:span><text:span text:style-name="T14">لاہور، ساہیوال، ملتان، راولپنڈی وغیرہ</text:span><text:span text:style-name="T15">) </text:span><text:span text:style-name="T14">کو پیپرز کی مارکنگ تیز کرنے اور جولائی و اگست کے اندر نتائج کا حتمی اعلان کرنے کے سخت احکامات جاری کیے جائیں۔</text:span><text:span text:style-name="T15"><text:line-break/></text:span><text:span text:style-name="T14">اگر طلبہ کے اس جائز اور تعلیمی مطالبے پر فوری ہمدردانہ غور نہ کیا گیا اور روایتی سستی برقرار رہی، تو پنجاب بھر کے طلبہ اور عوامی نمائندے اپنے تعلیمی مستقبل کے تحفظ کے لیے براہِ راست وزیرِ تعلیم پنجاب کے دفتر کے سامنے اپنا پرامن احتجاج اور مطالبات پیش کرنے پر مجبور ہوں گے۔</text:span><text:span text:style-name="T15"><text:line-break/></text:span><text:span text:style-name="T14">امید ہے کہ آپ طلبہ کی اس پکار کو سنیں گے اور مایوسی کا خاتمہ کریں گے۔</text:span><text:span text:style-name="T15"><text:line-break/></text:span><text:span text:style-name="T14">منجانب</text:span><text:span text:style-name="T15">:<text:line-break/></text:span><text:span text:style-name="T14">پنجاب بھر کے طلبہ و طالبات اور اراکینِ تعلیمی برادری</text:span><text:span text:style-name="T15"><text:line-break/></text:span><text:span text:style-name="T14">مورخہ</text:span><text:span text:style-name="T15">: 4 </text:span><text:span text:style-name="T14">جون </text:span><text:span text:style-name="T15">2026</text:span><text:span text:style-name="T14">ء</text:span></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the matter relates to declaration/scheduling of Matric and Intermediate examination results by Punjab Boards/PBCC and request for issuance of an early result timeline.</text:p>
            <text:p text:style-name="Standard"/>
            <text:p text:style-name="Standard">Since the subject pertains to Board examinations and result declaration, it does not fall within the direct regulatory jurisdiction of District Education Authority Lahore. The complaint may kindly be referred/marked to the competent authority i.e. Punjab Boards Committee of Chairmen/concerned BISEs/SED examination branch for consideration and further necessary action in accordance with rules and policy.</text:p>
            <text:p text:style-name="Standard"/>
            <text:p text:style-name="Standard">Submitted for kind perusal and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p>
      <text:p text:style-name="P14" loext:marker-style-name="T16"/>
      <text:p text:style-name="P15" loext:marker-style-name="T16"/>
      <text:p text:style-name="P16" loext:marker-style-name="T17"/>
      <text:p text:style-name="P16" loext:marker-style-name="T17"/>
      <text:p text:style-name="P16" loext:marker-style-name="T17"/>
      <text:p text:style-name="P17" loext:marker-style-name="T17"><text:span text:style-name="T17">DISTRICT EDUCATION OFFICER (M-EE)</text:span></text:p>
      <text:p text:style-name="P17" loext:marker-style-name="T17"><text:span text:style-name="T17">LAHORE</text:span></text:p>
      <text:p text:style-name="P7" loext:marker-style-name="T17"><text:span text:style-name="T17">CC.</text:span></text:p>
      <text:p text:style-name="P18"/>
      <text:list text:style-name="WWNum1">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4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5M4S</meta:editing-duration>
    <dc:date>2026-06-19T21:09:06.622305930</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1" meta:word-count="635" meta:character-count="3472" meta:non-whitespace-character-count="2849"/>
  </office:meta>
</office:document-meta>
</file>