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7821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Complaint Regarding Non-Availability of Medicines at Social Security Hospital I would like to file a complaint against the Social Security Hospital regarding the non-availability of prescribed medicines. I brought my child to the hospital for a medical check-up and, after examination, the doctor prescribed medicines. However, when I went to collect the medicines, I was informed that they were not available. This is not the first time I have faced this issue. On previous visits, I was repeatedly sent from one ward to another, and each time I received different information regarding the availability of medicines. Sometimes I was told to visit another ward, while at other times I was asked to come back later. I had to spend approximately Rs. 1,000 on petrol to travel to the hospital. In addition, I had to take leave from my job to bring my child for treatment. It is not possible for working people to take leave every day and make repeated visits to the hospital. Patients should not be asked to return again and again because medicines are unavailable. The hospital should ensure that prescribed medicines are available for patients at the time of their visit. I respectfully request the concerned authorities to investigate this matter and take necessary steps to ensure the regular availability of medicines so that patients and their families do not face unnecessary hardship and expenses.lahore bahria town maraka gao social security multan chungi</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lleged non-availability of prescribed medicines and inconvenience faced by a patient at Social Security Hospital.</text:p>
            <text:p/>
            <text:p>Since the subject pertains to hospital/medical services and does not fall within the regulatory jurisdiction of District Education Authority Lahore, the complaint may kindly be referred/marked to the competent authority i.e. Punjab Employees Social Security Institution/Health or Labour Department for verification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