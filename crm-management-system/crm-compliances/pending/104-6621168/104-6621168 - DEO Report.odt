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3111in"/>
    </style:style>
    <style:style style:name="Table1.B" style:family="table-column">
      <style:table-column-properties style:column-width="4.3153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3d9c8e"/>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57ee17"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510/PMDU</text:span><text:span text:style-name="T6">/</text:span><text:span text:style-name="T7">CRM</text:span></text:p>
            <text:p text:style-name="P5" loext:marker-style-name="T3"><text:span text:style-name="T8">Dated </text:span><text:span text:style-name="T5">17</text:span><text:span text:style-name="T8">/0</text:span><text:span text:style-name="T9">6</text:span><text:span text:style-name="T8">/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2116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Standard">The Chief Minister's Complaint Center received a complaint regarding the issue that a summer camp is being conducted at Hassan Memorial High School, located on Main Samanabad Road, despite the ongoing summer vacations announced by the Government. The complainant further stated that even if a summer camp has been permitted, classes should only be held up to Thursday, as Friday is observed as a weekly holiday in accordance with Government directions. However, the school reportedly conducted summer camp classes on Friday as well. The complainant has requested the relevant department, School Education Department, to look into the matter, verify compliance with the applicable regulations, and take the necessary action to resolve the issue at the earliest, please.</text:p>
          </table:table-cell>
          <table:table-cell table:style-name="Table1.B2" office:value-type="string">
            <text:p text:style-name="Standard">Respected Worthy Chief Executive Officer (DEA),</text:p>
            <text:p text:style-name="Standard"/>
            <text:p text:style-name="Standard">Reference to the complaint received through CM Complaint Portal and forwarded by your good office.</text:p>
            <text:p text:style-name="Standard"/>
            <text:p text:style-name="Standard">It is respectfully submitted that a preliminary review/verification of the complaint has been carried out on the basis of available information, field report, and relevant Government/School Education Department instructions. The complaint relates to Hassan Memorial High School, Main Samanabad Road, Lahore, regarding conduct of summer camp/classes on Friday during summer vacations.</text:p>
            <text:p text:style-name="Standard"/>
            <text:p text:style-name="Standard">As per Government instructions, summer camp/academic activities during vacation period may be conducted only subject to prescribed conditions; however, participation of students shall not be compulsory and notified holidays/timings are required to be observed. The concerned school management has been sensitized through field formation to ensure strict compliance of Government instructions in letter and spirit and to avoid any compulsory attendance or activity in violation of notified holiday schedule.</text:p>
            <text:p text:style-name="Standard"/>
            <text:p text:style-name="Standard">As per available report/record, no supporting documentary evidence such as timetable, school notice, attendance instruction, WhatsApp message, photographs, or any other proof regarding compulsory Friday classes has been provided with the complaint. Therefore, on the basis of available record, the matter stands addressed at field level. However, in case the complainant provides relevant evidence, the matter may be proceeded further in accordance with rules and policy.</text:p>
            <text:p text:style-name="Standard"/>
            <text:p text:style-name="Standard">Submitted for kind perusal and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7" loext:marker-style-name="T16"><text:span text:style-name="T16">CC.</text:span></text:p>
      <text:p text:style-name="P17"/>
      <text:list text:style-name="WWNum1">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4M3S</meta:editing-duration>
    <dc:date>2026-06-19T21:13:25.761063471</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22" meta:word-count="368" meta:character-count="2591" meta:non-whitespace-character-count="2236"/>
  </office:meta>
</office:document-meta>
</file>