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785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Subject: Complaint Regarding Unfair Admission Criteria NSCOE Respected Principal, I am writing to express my concern and disappointment regarding the admission criteria for Pre-KG admissions. As per the current policy, admissions are only being offered to children aged 3.5 years, while no admissions are being granted to KG students. I find this criterion unfair and difficult for families with more than one child. My daughter has been selected, but my son has been rejected due to the age criteria. It is not practical for me to enroll my children in different schools. Siblings should ideally be given the opportunity to study together in the same institution for the convenience of parents and the emotional well-being of children. Furthermore, I am concerned about the admission test conducted for children as young as three years old. Young children are being assessed on writing and other skills that are often taught at home by parents. At such an early age, a child's admission should not depend heavily on academic abilities. Schools are meant to nurture and develop these foundational skills rather than expect them before admission. I respectfully request the school administration to review and reconsider this admission policy and provide a fair solution for families facing similar situations. </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 of the complaint has been carried out on the basis of available information. The matter relates to admission criteria for Pre-KG/KG at NSCOE and request for consideration of sibling admission.</text:p>
            <text:p text:style-name="Standard"/>
            <text:p text:style-name="Standard">Admission in any institution is subject to notified criteria, age requirement, availability of seats, merit/SOPs, and institutional policy. The concerned institution/admission office has been sensitized to guide the parent properly and to consider the case strictly in accordance with applicable admission policy, without discrimination or undue hardship.</text:p>
            <text:p text:style-name="Standard"/>
            <text:p text:style-name="Standard">As per available report/record, no supporting documentary evidence such as admission form, rejection notice, age proof, sibling record, or notified admission criteria has been provided with the complaint. Therefore, on the basis of available record, the matter stands addressed at field level. However, in case the complainant provides relevant evidence, the matter may be proceeded further in accordance with rules and policy.</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8</meta:editing-cycles>
    <meta:editing-duration>PT3H5M40S</meta:editing-duration>
    <dc:date>2026-06-19T21:11:31.430147950</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418" meta:character-count="2802" meta:non-whitespace-character-count="2396"/>
  </office:meta>
</office:document-meta>
</file>