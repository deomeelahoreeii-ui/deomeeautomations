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3.0993in"/>
    </style:style>
    <style:style style:name="Table1.B" style:family="table-column">
      <style:table-column-properties style:column-width="4.5271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text-properties fo:font-size="10pt" style:font-size-asian="10pt" style:font-size-complex="10pt"/>
    </style:style>
    <style:style style:name="P13"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4"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7" style:family="paragraph" style:parent-style-name="Standard_20__28_WW_29_">
      <style:paragraph-properties fo:margin-left="3in" fo:text-align="center" style:justify-single-word="false"/>
      <style:text-properties officeooo:paragraph-rsid="003d9c8e"/>
    </style:style>
    <style:style style:name="P18" style:family="paragraph" style:parent-style-name="List_20_Paragraph">
      <style:paragraph-properties fo:margin-left="0in"/>
      <style:text-properties officeooo:paragraph-rsid="001c8166"/>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637ab5"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text:span><text:span text:style-name="T6">95</text:span><text:span text:style-name="T5">/PMDU</text:span><text:span text:style-name="T7">/</text:span><text:span text:style-name="T8">CRM</text:span></text:p>
            <text:p text:style-name="P5" loext:marker-style-name="T3"><text:span text:style-name="T9">Dated </text:span><text:span text:style-name="T5">1</text:span><text:span text:style-name="T6">3</text:span><text:span text:style-name="T9">/0</text:span><text:span text:style-name="T6">7</text:span><text:span text:style-name="T9">/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807805</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Standard">السلام علیکم پنجاب حکومت نے موسم سرما کی چھٹیوں میں سکول بند کرنے کا حکم دیا ہے۔خاص طور پر چھٹیاں کرنے کے بعد سکول کھولنے پر پابندی ہے مگر اس کے باوجود مقبول روڈ اچھرہ پر موجود باورڈ کیمپس سکول (پرنسپل مہوش مقبول) نے سکول کھول رکھا ہے۔شدید گرمی میں بھی بچوں کو دو مختلف اوقات میں سکول بلاکر فیسیں وصول کی جاری ہیں۔ٹیوشن کے نام پر سکول چلایا جارہا ہے جو سراسر زیادتی ہے۔جو بچے سکول نہ جائے اسے فیل کرنے یا نکالنے کی دھمکی دی جاتی ہے۔سکول انتظامیہ بااثر ہے براہ کرم میرا نام پوشیدہ رکھ کر سخت کارروائی عمل میں لائی جائے۔</text:p>
          </table:table-cell>
          <table:table-cell table:style-name="Table1.B2" office:value-type="string">
            <text:p text:style-name="P12">Respected Worthy Chief Executive Officer (DEA),<text:line-break/><text:line-break/>Reference to the complaint received through CM Complaint Portal and forwarded by your good office.<text:line-break/><text:line-break/>It is respectfully submitted that the complaint relates to the alleged operation of a privately managed school situated at Maqbool Road, Ichhra, Lahore, during the notified summer vacations, calling students at different timings, collection of charges in the name of tuition, and creating pressure upon students through alleged threats of failure or removal.<text:line-break/><text:line-break/>As per applicable Government instructions, summer camps and similar academic activities are not permissible during July. Privately managed schools are required to observe the notified vacation schedule and cannot compel students to attend classes, tuition, or any other academic activity during the closure period. Regular monthly tuition fee may be received in accordance with policy; however, no separate or additional charge may be imposed for unauthorized tuition or summer-camp activities.<text:line-break/><text:line-break/>As per the available field report, the school premises were found closed at the time of the visit and no academic activity was observed. However, the school management was sensitized to observe the notified summer vacations, refrain from conducting any unauthorized academic activity, compelling or threatening students and parents, or collecting any unauthorized additional charges, and to ensure strict compliance with Government instructions in letter and spirit.<text:line-break/><text:line-break/>The identity and particulars of the complainant have been kept confidential, and the matter has been taken up discreetly without disclosing the complainant’s identity. In view of the available field report and the position observed at the time of the visit, the matter stands addressed at field level. However, in case any contrary documentary evidence is provided or any violation is subsequently established, the matter may be proceeded further in accordance with rules and policy.<text:line-break/><text:line-break/>Submitted for kind perusal and further necessary action, please.</text:p>
          </table:table-cell>
        </table:table-row>
      </table:table>
      <text:p text:style-name="P13"><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4" loext:marker-style-name="T15"/>
      <text:p text:style-name="P15" loext:marker-style-name="T15"/>
      <text:p text:style-name="P16" loext:marker-style-name="T16"/>
      <text:p text:style-name="P16" loext:marker-style-name="T16"/>
      <text:p text:style-name="P16" loext:marker-style-name="T16"/>
      <text:p text:style-name="P17" loext:marker-style-name="T16"><text:span text:style-name="T16">DISTRICT EDUCATION OFFICER (M-EE)</text:span></text:p>
      <text:p text:style-name="P17" loext:marker-style-name="T16"><text:span text:style-name="T16">LAHORE</text:span></text:p>
      <text:p text:style-name="P7" loext:marker-style-name="T16"><text:span text:style-name="T16">CC.</text:span></text:p>
      <text:p text:style-name="P18"/>
      <text:list text:style-name="WWNum1">
        <text:list-item>
          <text:p text:style-name="P19">Office Record. </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62</meta:editing-cycles>
    <meta:editing-duration>PT3H12M57S</meta:editing-duration>
    <dc:date>2026-07-14T11:35:42.092128342</dc:date>
    <meta:generator>LibreOffice/26.2.4.2$Linux_X86_64 LibreOffice_project/64a984c51f4702dbd3710b13428c673a2f1292e7</meta:generator>
    <meta:print-date>2026-05-11T15:31:55.957393221</meta:print-date>
    <meta:printed-by>PDF files</meta:printed-by>
    <meta:document-statistic meta:table-count="2" meta:image-count="2" meta:object-count="0" meta:page-count="1" meta:paragraph-count="17" meta:word-count="435" meta:character-count="2794" meta:non-whitespace-character-count="2361"/>
  </office:meta>
</office:document-meta>
</file>