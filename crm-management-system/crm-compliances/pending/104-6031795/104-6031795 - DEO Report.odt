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3d9c8e"/>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031795</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Chief Minister Complaint Center received a complaint regarding the issue that the school management is providing Urdu medium textbooks to students who are enrolled in the English medium stream, and the complainant has requested the relevant department, School Education Department (SED), to look into the matter and resolve the issue, please. Furthermore, the complainant has requested that strict disciplinary action be taken against the school administration for this negligence which is affecting the students' academic progress." EMIS CODE 35210999</text:p>
          </table:table-cell>
          <table:table-cell table:style-name="Table1.B2" office:value-type="string">
            <text:p text:style-name="Text_20_body">Respected Worthy Chief Executive Officer (DEA),</text:p>
            <text:p text:style-name="Text_20_body">Reference to the complaint received through CM Complaint Portal and forwarded by your good office.</text:p>
            <text:p text:style-name="Text_20_body">It is respectfully submitted that the matter relates to alleged provision of Urdu medium textbooks to students enrolled in English medium stream against EMIS Code 35210999.</text:p>
            <text:p text:style-name="Text_20_body">Since the complaint pertains to a High School/Secondary level institution, the matter may kindly be referred/marked to the District Education Officer (SE), Lahore, being the concerned supervisory authority, for verification of record and further necessary action in accordance with rules and policy.</text:p>
            <text:p text:style-name="Text_20_body">Submitted for kind perusal and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7" loext:marker-style-name="T16"><text:span text:style-name="T16">CC.</text:span></text:p>
      <text:p text:style-name="P17"/>
      <text:list text:style-name="WWNum1">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7</meta:editing-cycles>
    <meta:editing-duration>PT3H6M4S</meta:editing-duration>
    <dc:date>2026-06-19T20:49:45.18664976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1" meta:word-count="212" meta:character-count="1487" meta:non-whitespace-character-count="1287"/>
  </office:meta>
</office:document-meta>
</file>