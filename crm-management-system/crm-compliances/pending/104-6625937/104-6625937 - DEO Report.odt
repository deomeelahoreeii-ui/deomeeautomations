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25937</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As school teacher Intern I want to let you know that our contract was from 24feburary 2026 to 31 May 2026 but we have received salary upto 21 May in Mianwali District.Kindly make sure to release our pending payment as clerks are telling that it is deducted due to summer vocations..</text:p>
          </table:table-cell>
          <table:table-cell table:style-name="Table1.B2" office:value-type="string">
            <text:p>Respected Worthy Chief Executive Officer (DEA),</text:p>
            <text:p/>
            <text:p>Reference to the complaint received through CM Complaint Portal and forwarded by your good office.</text:p>
            <text:p/>
            <text:p>It is respectfully submitted that the matter relates to alleged pending payment of School Teacher Intern stipend/salary for District Mianwali.</text:p>
            <text:p/>
            <text:p>Since the subject pertains to District Mianwali/STI payment record and does not fall within the direct jurisdiction of District Education Authority Lahore, the complaint may kindly be referred/marked to the competent authority i.e. CEO (DEA) Mianwali/concerned STI stipend/payment branch for verification of contract period, attendance, payment record, and further necessary action in accordance with rules and policy.</text:p>
            <text:p/>
            <text:p>Submitted for kind perusal and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