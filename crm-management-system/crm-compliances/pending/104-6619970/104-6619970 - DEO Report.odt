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1997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ubject: Request for Recognition and Utilization of Experienced Overseas Pakistani Women Professionals Dear Chief Minister Maryam Nawaz, I am writing to bring to your attention an issue faced by many experienced and qualified women who return to Pakistan after spending years working and contributing professionally abroad. I am an Etiquette and Communication Skills Consultant with over 25 years of professional experience. During my years in Saudi Arabia, I worked closely with educational institutions and diplomatic missions, gaining valuable expertise in training, professional development, communication, and public engagement. Upon returning to Pakistan, I was eager to contribute my knowledge and experience toward the development of our institutions and society. However, I have found that the professional experience and accomplishments of overseas Pakistanis, particularly women, often go unrecognized and underutilized. Despite possessing extensive expertise, many of us struggle to find meaningful opportunities to contribute at the government, educational, or institutional level. Our skills, experience, and international exposure remain largely untapped. At the age of 57, I still have the energy, passion, and commitment to serve. I believe there are countless women like me who are not seeking retirement but rather opportunities to continue contributing as advisors, trainers, mentors, and consultants. We have spent decades acquiring knowledge and experience that can benefit government departments, educational institutions, training academies, and community development initiatives. I respectfully request that the Government of Punjab consider creating a platform, registry, or advisory program for experienced women professionals and overseas returnees. Such an initiative could identify qualified individuals, assess their expertise, and connect them with institutions that can benefit from their knowledge and experience. Women who have dedicated their lives to professional growth should not be left without avenues to contribute. Our experience is a valuable national asset that can help strengthen institutions, mentor younger generations, and support the province's development goals. I sincerely appreciate your commitment to women's empowerment and hope that this matter will receive your kind consideration. Yours sincerely, Shamaila Shahbaz Etiquette &amp; Communication Skills Consultant CEO, Eminence Etiquette Institute Author, Elegant Encounters: Mastering the Fine Arts of Social Etiquette contact: 03310366968</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complaint is in the nature of a policy/employment suggestion regarding utilization of experienced overseas Pakistani women professionals in institutional training and development.</text:p>
            <text:p/>
            <text:p>The subject does not disclose any specific grievance against a school under the immediate regulatory jurisdiction of District Education Authority Lahore. The application may kindly be placed before/referred to the competent policy or HR forum for consideration, if deemed appropriate, in accordance with Government recruitment, procurement, and engagement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