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37233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has received a complaint concerning a matter related to the School Education. The Citizen says that a government-run sewing and embroidery institute in their locality has been illegally occupied by land grabbers, completely halting all vocational training and leaving the public facility completely non-functional. To safeguard public property and benefit the community, it is highly recommended to immediately evict the illegal occupants and merge this vacant building with the nearby overcrowded government school to accommodate its growing student strength. The complainant has requested that you look into the matter and resolve the issue, please. Labri Institue Near Gulzar Havali</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lleged illegal occupation of a Government sewing/embroidery/vocational institute building near Gulzar Haveli and request to retrieve/merge the building with a nearby Government school.</text:p>
            <text:p/>
            <text:p>Since the subject involves ownership/possession of public property, possible encroachment, and status of a vocational institute, it requires verification by the competent owner department/revenue/local administration. The complaint may kindly be referred/marked to the concerned competent authority/Deputy Commissioner/owner department for verification of property status and further necessary action in accordance with law and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