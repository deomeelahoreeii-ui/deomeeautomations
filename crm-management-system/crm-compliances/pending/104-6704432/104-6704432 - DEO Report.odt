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officeooo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officeooo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officeooo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officeooo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officeooo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officeooo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officeooo:paragraph-rsid="001c8166"/>
    </style:style>
    <style:style style:name="P8" style:family="paragraph" style:parent-style-name="Standard_20__28_WW_29_">
      <style:text-properties fo:color="#000000" loext:opacity="100%" style:font-name="Bookman Old Style" fo:font-weight="bold" officeooo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loext:opacity="100%" style:font-name="Bookman Old Style" fo:font-weight="bold" officeooo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officeooo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d93e2" officeooo:paragraph-rsid="001d93e2" style:font-weight-asian="bold" style:font-weight-complex="bold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style:text-underline-style="none" fo:font-weight="normal" officeooo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4" style:family="paragraph" style:parent-style-name="Standard_20__28_WW_29_">
      <style:paragraph-properties fo:text-align="justify" style:justify-single-word="false" fo:text-indent="0.5in" style:auto-text-indent="false" loext:word-spacing-minimum="75%" loext:word-spacing-maximum="133%"/>
      <style:text-properties fo:color="#000000" loext:opacity="100%" style:font-name="Bookman Old Style" officeooo:paragraph-rsid="001c8166"/>
    </style:style>
    <style:style style:name="P15" style:family="paragraph" style:parent-style-name="Standard_20__28_WW_29_">
      <style:paragraph-properties fo:text-align="justify" style:justify-single-word="false" loext:word-spacing-minimum="75%" loext:word-spacing-maximum="133%"/>
      <style:text-properties fo:color="#000000" loext:opacity="100%" style:font-name="Bookman Old Style" officeooo:paragraph-rsid="001c8166"/>
    </style:style>
    <style:style style:name="P16" style:family="paragraph" style:parent-style-name="Standard_20__28_WW_29_">
      <style:paragraph-properties fo:margin-left="3in" fo:text-align="center" style:justify-single-word="false"/>
      <style:text-properties fo:color="#000000" loext:opacity="100%" style:font-name="Bookman Old Style" fo:font-weight="bold" officeooo:paragraph-rsid="001c8166" style:font-weight-asian="bold"/>
    </style:style>
    <style:style style:name="P17" style:family="paragraph" style:parent-style-name="Standard_20__28_WW_29_">
      <style:paragraph-properties fo:margin-left="3in" fo:text-align="center" style:justify-single-word="false"/>
      <style:text-properties officeooo:paragraph-rsid="003d9c8e"/>
    </style:style>
    <style:style style:name="P18" style:family="paragraph" style:parent-style-name="List_20_Paragraph">
      <style:paragraph-properties fo:margin-left="0in"/>
      <style:text-properties officeooo:paragraph-rsid="001c8166"/>
    </style:style>
    <style:style style:name="P19" style:family="paragraph" style:parent-style-name="List_20_Paragraph" style:list-style-name="WWNum1">
      <style:paragraph-properties fo:margin-top="0in" fo:margin-bottom="0.111in" style:contextual-spacing="true"/>
      <style:text-properties fo:color="#000000" loext:opacity="100%" style:font-name="Bookman Old Style" officeooo:paragraph-rsid="001c8166"/>
    </style:style>
    <style:style style:name="P20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loext:opacity="100%" style:font-name="Bookman Old Style" officeooo:rsid="003bb5e8" officeooo:paragraph-rsid="003bb5e8"/>
    </style:style>
    <style:style style:name="T1" style:family="text"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officeooo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officeooo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officeooo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officeooo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officeooo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loext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officeooo:rsid="003fa767"/>
    </style:style>
    <style:style style:name="T12" style:family="text">
      <style:text-properties fo:font-variant="normal" fo:text-transform="none" style:use-window-font-color="true" loext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loext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style:text-outline="false" style:text-line-through-style="none" style:text-line-through-type="none" fo:font-family="'Noto Sans Devanagari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use-window-font-color="true" loext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6" style:family="text">
      <style:text-properties fo:color="#000000" loext:opacity="100%" style:font-name="Bookman Old Style"/>
    </style:style>
    <style:style style:name="T17" style:family="text">
      <style:text-properties fo:color="#000000" loext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loext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loext:marker-style-name="T3"><text:span text:style-name="T4">OFFICE OF THE</text:span></text:p>
            <text:p text:style-name="P4" loext:marker-style-name="T3"><text:span text:style-name="T4">DISTRICT EDUCATION OFFICER (M-EE)</text:span></text:p>
            <text:p text:style-name="P4" loext:marker-style-name="T4"><text:span text:style-name="T4">LAHORE</text:span></text:p>
            <text:p text:style-name="P5" loext:marker-style-name="T4"><text:span text:style-name="T4">No. </text:span><text:span text:style-name="T5">1510/PMDU</text:span><text:span text:style-name="T6">/</text:span><text:span text:style-name="T7">CRM</text:span></text:p>
            <text:p text:style-name="P5" loext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loext:marker-style-name="T1"><text:span text:style-name="Strong_20_Emphasis"><text:span text:style-name="T1"/></text:span></text:p>
      <text:p text:style-name="P7" loext:marker-style-name="T10"><text:span text:style-name="T10">To: <text:tab/><text:tab/></text:span></text:p>
      <text:p text:style-name="P8" loext:marker-style-name="T10"><text:tab/><text:tab/><text:span text:style-name="T11">The </text:span>Chief Executive Officer (DEA), </text:p>
      <text:p text:style-name="P8" loext:marker-style-name="T10"><text:tab/><text:tab/>Lahore</text:p>
      <text:p text:style-name="P9" loext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6704432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 text:style-name="P12" loext:marker-style-name="T14"><text:span text:style-name="T14">انٹرمیڈیٹ سالانہ امتحان 2026ء میں امتحانی بے ضابطگیوں، انتظامی غفلت اور طالبات</text:span></text:p>
            <text:p text:style-name="P12" loext:marker-style-name="T14"><text:span text:style-name="T14"><text:s/>کے ساتھ ہونے والی ناانصافی کی تحقیقات اور فوری ریلیف کی درخواست</text:span><text:span text:style-name="T14"/></text:p>
            <text:p text:style-name="Standard"/>
          </table:table-cell>
          <table:table-cell table:style-name="Table1.B2" office:value-type="string">
            <text:p text:style-name="Standard">Respected Worthy Chief Executive Officer (DEA),</text:p>
            <text:p text:style-name="Standard"/>
            <text:p text:style-name="Standard">Reference to the complaint received through CM Complaint Portal and forwarded by your good office.</text:p>
            <text:p text:style-name="Standard"/>
            <text:p text:style-name="Standard">It is respectfully submitted that the matter relates to alleged irregularities/mismanagement in Intermediate Annual Examination 2026 and request for relief to students.</text:p>
            <text:p text:style-name="Standard"/>
            <text:p text:style-name="Standard">Since the subject pertains to examination/board affairs and does not fall within the direct regulatory jurisdiction of District Education Authority Lahore, the complaint may kindly be referred/marked to the competent authority i.e. concerned Board of Intermediate &amp; Secondary Education/Chairman Board/Controller Examinations for verification and further necessary action in accordance with rules and policy.</text:p>
            <text:p text:style-name="Standard"/>
            <text:p text:style-name="Standard">Submitted for kind perusal and further necessary action, please.</text:p>
          </table:table-cell>
        </table:table-row>
      </table:table>
      <text:p text:style-name="P13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5"/></text:span></text:p>
      <text:p text:style-name="P14" loext:marker-style-name="T16"/>
      <text:p text:style-name="P15" loext:marker-style-name="T16"/>
      <text:p text:style-name="P16" loext:marker-style-name="T17"/>
      <text:p text:style-name="P16" loext:marker-style-name="T17"/>
      <text:p text:style-name="P16" loext:marker-style-name="T17"/>
      <text:p text:style-name="P17" loext:marker-style-name="T17"><text:span text:style-name="T17">DISTRICT EDUCATION OFFICER (M-EE)</text:span></text:p>
      <text:p text:style-name="P17" loext:marker-style-name="T17"><text:span text:style-name="T17">LAHORE</text:span></text:p>
      <text:p text:style-name="P7" loext:marker-style-name="T17"><text:span text:style-name="T17">CC.</text:span></text:p>
      <text:p text:style-name="P18"/>
      <text:list text:style-name="WWNum1">
        <text:list-item>
          <text:p text:style-name="P19">Office Record. 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7</meta:editing-cycles>
    <meta:editing-duration>PT3H4M32S</meta:editing-duration>
    <dc:date>2026-06-19T21:20:33.220399828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22" meta:word-count="164" meta:character-count="1180" meta:non-whitespace-character-count="1028"/>
  </office:meta>
</office:document-meta>
</file>