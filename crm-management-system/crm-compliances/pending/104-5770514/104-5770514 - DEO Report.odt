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text-align="justify" style:justify-single-word="false" fo:orphans="0" fo:widows="0"/>
      <style:text-properties style:font-name="Google Sans Text" fo:font-size="9pt" fo:font-weight="normal" officeooo:paragraph-rsid="005323e3" style:font-size-asian="9pt" style:font-weight-asian="normal" style:font-size-complex="9pt" style:font-weight-complex="normal"/>
    </style:style>
    <style:style style:name="P13" style:family="paragraph" style:parent-style-name="Text_20_body">
      <style:paragraph-properties fo:text-align="justify" style:justify-single-word="false" fo:orphans="0" fo:widows="0"/>
      <style:text-properties style:font-name="Google Sans Text" fo:font-size="9pt" style:font-size-asian="9pt" style:font-size-complex="9pt"/>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577051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 *HIGH ALERT: Serious Concerns Regarding PECTAA Grade 8 Annual English Exam* Assalam-o-Alaikum! As a subject specialist of English, I would like to bring to your attention the serious mistakes found in the *Grade 8 Annual English Examination* conducted under your supervision. A huge amount of resources has been spent by the Punjab Government on these exams, but unfortunately, the paper reflects a lack of professionalism. There are multiple issues, including incorrect and missing answer keys, spelling and grammatical mistakes, and poorly constructed questions. This is just one subject; if other subjects are reviewed, there may be many more errors. As an educationist, I strongly believe that students deserve error-free papers, and PECTAA should ensure accurate and reliable results instead of flawed or dummy outcomes. It is also concerning that marking is being carried out without proper training. Moreover, Assessment Director should be handled by individuals with relevant experience not a M.A. pass in Islamiat who have no single time experience in Assessment. Appointing someone without the necessary expertise can lead to such serious issues. This matter requires immediate attention to ensure quality, fairness, and credibility in the examination system.</text:p>
          </table:table-cell>
          <table:table-cell table:style-name="Table1.B2" office:value-type="string">
            <text:p text:style-name="P12">Respected Worthy Chief Executive Officer (DEA),</text:p>
            <text:p text:style-name="P13">Reference to the complaint received through CM Complaint Portal and forwarded by your good office.</text:p>
            <text:p text:style-name="P13">It is respectfully submitted that the matter relates to alleged errors in Grade 8 Annual English Examination, answer keys, paper quality, marking/training process, and assessment-related administrative arrangements under PECTAA/concerned Assessment Authority.</text:p>
            <text:p text:style-name="P13">Since the subject pertains to examination/assessment policy, paper-setting, answer-key verification, and marking mechanism, it does not fall within the direct regulatory jurisdiction of District Education Authority Lahore. The complaint may kindly be referred/marked to the competent authority i.e. PECTAA/School Education Department Assessment Wing/Punjab Examination Commission for technical review, verification of record, and further necessary action in accordance with rules and policy.</text:p>
            <text:p text:style-name="P13">Submitted for kind perusal and further necessary action, please.</text:p>
            <text:p text:style-name="P12"/>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loext:marker-style-name="T15"/>
      <text:p text:style-name="P16" loext:marker-style-name="T15"/>
      <text:p text:style-name="P17" loext:marker-style-name="T16"/>
      <text:p text:style-name="P17" loext:marker-style-name="T16"/>
      <text:p text:style-name="P17" loext:marker-style-name="T16"/>
      <text:p text:style-name="P18" loext:marker-style-name="T16"><text:span text:style-name="T16">DISTRICT EDUCATION OFFICER (M-EE)</text:span></text:p>
      <text:p text:style-name="P18" loext:marker-style-name="T16"><text:span text:style-name="T16">LAHORE</text:span></text:p>
      <text:p text:style-name="P7" loext: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7</meta:editing-cycles>
    <meta:editing-duration>PT3H4M42S</meta:editing-duration>
    <dc:date>2026-06-19T20:46:59.868817959</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1" meta:word-count="347" meta:character-count="2485" meta:non-whitespace-character-count="2150"/>
  </office:meta>
</office:document-meta>
</file>