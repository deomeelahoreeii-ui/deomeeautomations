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8507in"/>
    </style:style>
    <style:style style:name="Table1.B" style:family="table-column">
      <style:table-column-properties style:column-width="3.77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512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We as a community add our share to better the conditions of the school but the CEO of schools don't bother to post a night chokidar at the school or ( approx 6 kanal) so repeated theft incidents have occurred. on 25th or 26th night again thieves entered the school, broke the locks and a substantial loss occurred. The school wall 180 feet long and 8 feet high had fallen for the last few months and the school was unprotected and no funds were provided by the CEO's office. We by our own sources has completed the wall this week instead of waiting for funds from the CEO's office which is least bothered to correct the plight of poor +200 kids. Please look into the matter so problems may be solved. Hope a top priority will be given to the matter and the police may be approached to apprehend the thieves. </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a preliminary review of the complaint has been carried out on the basis of available information. The complaint relates to alleged theft incidents, absence of night security/chowkidar, damaged boundary wall, and lack of protection of a school premises; however, no specific school name, EMIS code, location, markaz/tehsil, or district has been provided in the complaint.</text:p>
            <text:p text:style-name="Text_20_body">The concerned branch/field formation has been sensitized to ensure that matters relating to school safety, boundary walls, security arrangements, and theft incidents are dealt with on priority as per available record, policy, and availability of resources. In case of any theft incident, the school administration concerned is required to approach the local police as per procedure.</text:p>
            <text:p text:style-name="Text_20_body">In the absence of complete particulars, the present complaint cannot be processed against any specific school at this stage. The complainant may be advised to provide complete details including school name, EMIS code, exact location, date of incident, loss detail, police report/FIR if any, photographs, and any relevant record, so that the matter may be examined and proceeded further in accordance with rules and policy.</text:p>
            <text:p text:style-name="Text_20_body">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9</meta:editing-cycles>
    <meta:editing-duration>PT3H6M4S</meta:editing-duration>
    <dc:date>2026-06-19T20:57:31.045230765</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97" meta:character-count="2479" meta:non-whitespace-character-count="2094"/>
  </office:meta>
</office:document-meta>
</file>