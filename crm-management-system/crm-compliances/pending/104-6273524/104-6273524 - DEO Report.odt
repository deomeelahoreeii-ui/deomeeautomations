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64in" fo:margin-left="-0.2319in" table:align="left"/>
    </style:style>
    <style:style style:name="Table1.A" style:family="table-column">
      <style:table-column-properties style:column-width="3.2889in"/>
    </style:style>
    <style:style style:name="Table1.B" style:family="table-column">
      <style:table-column-properties style:column-width="4.3375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c8166"/>
    </style:style>
    <style:style style:name="P4" style:family="paragraph" style:parent-style-name="Standard_20__28_WW_29_">
      <style:paragraph-properties fo:margin-left="1in" fo:text-align="center" style:justify-single-word="false"/>
      <style:text-properties officeooo:paragraph-rsid="001c8166"/>
    </style:style>
    <style:style style:name="P5" style:family="paragraph" style:parent-style-name="Standard_20__28_WW_29_">
      <style:paragraph-properties fo:margin-left="1in" fo:text-align="center" style:justify-single-word="false"/>
      <style:text-properties officeooo:paragraph-rsid="0046cd95"/>
    </style:style>
    <style:style style:name="P6"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officeooo:paragraph-rsid="001c8166"/>
    </style:style>
    <style:style style:name="P8" style:family="paragraph" style:parent-style-name="Standard_20__28_WW_29_">
      <style:text-properties fo:color="#000000" loext:opacity="100%" style:font-name="Bookman Old Style" fo:font-weight="bold" officeooo:paragraph-rsid="003f469d" style:font-name-asian="Times New Roman" style:font-weight-asian="bold" style:font-name-complex="Calibri1" style:font-weight-complex="bold"/>
    </style:style>
    <style:style style:name="P9" style:family="paragraph" style:parent-style-name="Standard_20__28_WW_29_">
      <style:text-properties fo:color="#000000" loext:opacity="100%" style:font-name="Bookman Old Style" fo:font-weight="bold" officeooo: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officeooo:paragraph-rsid="002125b8"/>
    </style:style>
    <style:style style:name="P11" style:family="paragraph" style:parent-style-name="Table_20_Contents">
      <style:paragraph-properties fo:text-align="center" style:justify-single-word="false"/>
      <style:text-properties fo:font-weight="bold" officeooo:rsid="001d93e2" officeooo:paragraph-rsid="001d93e2" style:font-weight-asian="bold" style:font-weight-complex="bold"/>
    </style:style>
    <style:style style:name="P12"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c8166" style:font-name-asian="Times New Roman" style:font-size-asian="12pt" style:font-style-asian="normal" style:font-weight-asian="normal" style:font-name-complex="Calibri1" style:font-weight-complex="normal"/>
    </style:style>
    <style:style style:name="P13"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c8166"/>
    </style:style>
    <style:style style:name="P14"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c8166"/>
    </style:style>
    <style:style style:name="P15" style:family="paragraph" style:parent-style-name="Standard_20__28_WW_29_">
      <style:paragraph-properties fo:margin-left="3in" fo:text-align="center" style:justify-single-word="false"/>
      <style:text-properties fo:color="#000000" loext:opacity="100%" style:font-name="Bookman Old Style" fo:font-weight="bold" officeooo:paragraph-rsid="001c8166" style:font-weight-asian="bold"/>
    </style:style>
    <style:style style:name="P16" style:family="paragraph" style:parent-style-name="Standard_20__28_WW_29_">
      <style:paragraph-properties fo:margin-left="3in" fo:text-align="center" style:justify-single-word="false"/>
      <style:text-properties officeooo:paragraph-rsid="003d9c8e"/>
    </style:style>
    <style:style style:name="P17" style:family="paragraph" style:parent-style-name="List_20_Paragraph">
      <style:paragraph-properties fo:margin-left="0in"/>
      <style:text-properties officeooo:paragraph-rsid="001c8166"/>
    </style:style>
    <style:style style:name="P18" style:family="paragraph" style:parent-style-name="List_20_Paragraph" style:list-style-name="WWNum1">
      <style:paragraph-properties fo:margin-top="0in" fo:margin-bottom="0.111in" style:contextual-spacing="true"/>
      <style:text-properties fo:color="#000000" loext:opacity="100%" style:font-name="Bookman Old Style" officeooo:paragraph-rsid="001c8166"/>
    </style:style>
    <style:style style:name="P19"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3bb5e8"/>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officeooo: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officeooo: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officeooo: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officeooo:rsid="0057ee17" style:language-asian="en" style:country-asian="US" style:font-weight-asian="bold" style:font-name-complex="Calibri1" style:language-complex="ar" style:country-complex="SA"/>
    </style:style>
    <style:style style:name="T10" style:family="text">
      <style:text-properties fo:color="#000000" loext:opacity="100%" style:font-name="Bookman Old Style" fo:font-weight="bold" style:font-name-asian="Times New Roman" style:font-weight-asian="bold" style:font-name-complex="Calibri1" style:font-weight-complex="bold"/>
    </style:style>
    <style:style style:name="T11" style:family="text">
      <style:text-properties officeooo:rsid="003fa767"/>
    </style:style>
    <style:style style:name="T12"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loext: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loext:opacity="100%" style:font-name="Bookman Old Style"/>
    </style:style>
    <style:style style:name="T16"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5" loext:marker-style-name="T4"><text:span text:style-name="T4">No. </text:span><text:span text:style-name="T5">1510/PMDU</text:span><text:span text:style-name="T6">/</text:span><text:span text:style-name="T7">CRM</text:span></text:p>
            <text:p text:style-name="P5" loext:marker-style-name="T3"><text:span text:style-name="T8">Dated </text:span><text:span text:style-name="T5">17</text:span><text:span text:style-name="T8">/0</text:span><text:span text:style-name="T9">6</text:span><text:span text:style-name="T8">/2026</text:span></text:p>
          </table:table-cell>
        </table:table-row>
      </table:table>
      <text:p text:style-name="P6" loext:marker-style-name="T1"><text:span text:style-name="Strong_20_Emphasis"><text:span text:style-name="T1"/></text:span></text:p>
      <text:p text:style-name="P7" loext:marker-style-name="T10"><text:span text:style-name="T10">To: <text:tab/><text:tab/></text:span></text:p>
      <text:p text:style-name="P8" loext:marker-style-name="T10"><text:tab/><text:tab/><text:span text:style-name="T11">The </text:span>Chief Executive Officer (DEA), </text:p>
      <text:p text:style-name="P8" loext:marker-style-name="T10"><text:tab/><text:tab/>Lahore</text:p>
      <text:p text:style-name="P9" loext: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273524</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 text:style-name="Standard">Citizen says that, as informed earlier, he was working in the School Education Department and retired three years ago. He further states that some of his dues and remaining payments are still pending and have not been cleared yet. The citizen mentions that despite the passage of time, he has not received his outstanding payments. He requests the concerned department to look into the matter and release all his pending dues at the earliest.</text:p>
          </table:table-cell>
          <table:table-cell table:style-name="Table1.B2" office:value-type="string">
            <text:p text:style-name="Text_20_body">Respected Worthy Chief Executive Officer (DEA),</text:p>
            <text:p text:style-name="Text_20_body">Reference to the complaint received through CM Complaint Portal and forwarded by your good office.</text:p>
            <text:p text:style-name="Text_20_body">It is respectfully submitted that a preliminary review of the complaint has been carried out on the basis of available information. The complaint relates to alleged pending dues/payments of a retired employee of School Education Department; however, no specific particulars such as name, designation, personal number, place of posting, district, date of retirement, PPO/pension case number, or detail of pending dues have been provided.</text:p>
            <text:p text:style-name="Text_20_body">The concerned branch has been sensitized to process all pending retirement/dues cases strictly in accordance with available record, rules, and policy. However, in the absence of complete service particulars and supporting documents, the present complaint cannot be processed against any specific case at this stage.</text:p>
            <text:p text:style-name="Text_20_body">The complainant may be advised to provide complete relevant record, including retirement order, CNIC, personal number, last place of posting, district, PPO/pension documents, and detail of claimed pending dues before the concerned office/competent authority, so that the matter may be examined and proceeded further in accordance with rules and policy.</text:p>
            <text:p text:style-name="Text_20_body">Submitted for kind perusal and further necessary action, please.</text:p>
          </table:table-cell>
        </table:table-row>
      </table:table>
      <text:p text:style-name="P12"><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3" loext:marker-style-name="T15"/>
      <text:p text:style-name="P14" loext:marker-style-name="T15"/>
      <text:p text:style-name="P15" loext:marker-style-name="T16"/>
      <text:p text:style-name="P15" loext:marker-style-name="T16"/>
      <text:p text:style-name="P15" loext:marker-style-name="T16"/>
      <text:p text:style-name="P16" loext:marker-style-name="T16"><text:span text:style-name="T16">DISTRICT EDUCATION OFFICER (M-EE)</text:span></text:p>
      <text:p text:style-name="P16" loext:marker-style-name="T16"><text:span text:style-name="T16">LAHORE</text:span></text:p>
      <text:p text:style-name="P7" loext:marker-style-name="T16"><text:span text:style-name="T16">CC.</text:span></text:p>
      <text:p text:style-name="P17"/>
      <text:list text:style-name="WWNum1">
        <text:list-item>
          <text:p text:style-name="P18">Office Record. </text:p>
        </text:list-item>
      </text:list>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8</meta:editing-cycles>
    <meta:editing-duration>PT3H6M17S</meta:editing-duration>
    <dc:date>2026-06-19T20:54:25.662720992</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22" meta:word-count="298" meta:character-count="2008" meta:non-whitespace-character-count="1723"/>
  </office:meta>
</office:document-meta>
</file>