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64in" fo:margin-left="-0.2319in" table:align="left"/>
    </style:style>
    <style:style style:name="Table1.A" style:family="table-column">
      <style:table-column-properties style:column-width="4.6875in"/>
    </style:style>
    <style:style style:name="Table1.B" style:family="table-column">
      <style:table-column-properties style:column-width="2.9389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6" style:family="paragraph" style:parent-style-name="Standard_20__28_WW_29_">
      <style:paragraph-properties fo:margin-left="3in" fo:text-align="center" style:justify-single-word="false"/>
      <style:text-properties officeooo:paragraph-rsid="003d9c8e"/>
    </style:style>
    <style:style style:name="P17" style:family="paragraph" style:parent-style-name="List_20_Paragraph">
      <style:paragraph-properties fo:margin-left="0in"/>
      <style:text-properties officeooo:paragraph-rsid="001c8166"/>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57ee17"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510/PMDU</text:span><text:span text:style-name="T6">/</text:span><text:span text:style-name="T7">CRM</text:span></text:p>
            <text:p text:style-name="P5" loext:marker-style-name="T3"><text:span text:style-name="T8">Dated </text:span><text:span text:style-name="T5">17</text:span><text:span text:style-name="T8">/0</text:span><text:span text:style-name="T9">6</text:span><text:span text:style-name="T8">/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1578867</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Standard">Respected Sir / Madam, I am writing with deep respect and sincere hope regarding the admission of my daughter, Khadija Shoaib, who is on the autism spectrum. My name is Osama Ahmed Bashir (CNIC: 36502-4430961-5, Contact: 0336-4393709), and we are residents of Lahore. When the Maryam Nawaz School &amp; Resource Centre for Autism project was announced, it became a ray of hope for families like ours. In line with the officially announced SOPs, we followed each and every required step for induction. My daughter was: Interviewed and enrolled for assessment at the Garden Town office/school for disabilities (behind Barkat Market), as directed. Formally evaluated for Autism Spectrum Disorder at Children’s Hospital, Lahore. All required assessments were completed strictly according to instructions. I will also be attaching copies/pictures of the assessment reports for your reference. Now that the school has started operating, we have not received any call or update, which has left us extremely disappointed and worried. My daughter is on the low spectrum of autism, and with timely and structured intervention, she has a strong chance of improvement, InshaAllah. Unfortunately, private treatment options—despite being extremely expensive—have shown limited results and are financially very difficult to continue long-term. This institution represents not just education, but hope, stability, and a future for children like my daughter. As a parent nearing 40, a constant concern weighs heavily on my heart: who will care for and protect my child after us, if Allah forbid we are no longer here? Early intervention today can determine whether she becomes independent tomorrow. I humbly and respectfully request the management to please review our case once again and consider the admission of my daughter into this institution. We firmly believe this centre was established for children like Khadija, and we place our trust in its mission and leadership. I shall remain deeply grateful for your compassion, understanding, and support. Yours sincerely, Osama Ahmed Bashir Father of Khadija Shoaib CNIC: 36502-4430961-5 Contact: 0336-4393709 Lahore</text:p>
          </table:table-cell>
          <table:table-cell table:style-name="Table1.B2" office:value-type="string">
            <text:p text:style-name="Standard">Respected Worthy Chief Executive Officer (DEA),</text:p>
            <text:p text:style-name="Standard"/>
            <text:p text:style-name="Standard">Reference to the complaint received through CM Complaint Portal and forwarded by your good office.</text:p>
            <text:p text:style-name="Standard"/>
            <text:p text:style-name="Standard">It is respectfully submitted that the matter relates to admission request/grievance regarding Khadija Shoaib in Maryam Nawaz School &amp; Resource Centre for Autism after assessment and completion of required steps.</text:p>
            <text:p text:style-name="Standard"/>
            <text:p text:style-name="Standard">Since admissions in the specialised centre are subject to prescribed SOPs, assessment result, eligibility, seat availability, and approval of the competent admission committee, the complaint may kindly be referred/marked to the competent authority i.e. Special Education Department/management of Maryam Nawaz School &amp; Resource Centre for Autism for verification and further necessary action in accordance with policy.</text:p>
            <text:p text:style-name="Standard"/>
            <text:p text:style-name="Standard">Submitted for kind perusal and further necessary action, please.</text:p>
          </table:table-cell>
        </table:table-row>
      </table:table>
      <text:p text:style-name="P12"><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3" loext:marker-style-name="T15"/>
      <text:p text:style-name="P14" loext:marker-style-name="T15"/>
      <text:p text:style-name="P15" loext:marker-style-name="T16"/>
      <text:p text:style-name="P15" loext:marker-style-name="T16"/>
      <text:p text:style-name="P15" loext:marker-style-name="T16"/>
      <text:p text:style-name="P16" loext:marker-style-name="T16"><text:span text:style-name="T16">DISTRICT EDUCATION OFFICER (M-EE)</text:span></text:p>
      <text:p text:style-name="P16" loext:marker-style-name="T16"><text:span text:style-name="T16">LAHORE</text:span></text:p>
      <text:p text:style-name="P7" loext:marker-style-name="T16"><text:span text:style-name="T16">CC.</text:span></text:p>
      <text:p text:style-name="P17"/>
      <text:list text:style-name="WWNum1">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7</meta:editing-cycles>
    <meta:editing-duration>PT3H4M25S</meta:editing-duration>
    <dc:date>2026-06-19T19:59:53.275396385</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21" meta:word-count="479" meta:character-count="3238" meta:non-whitespace-character-count="2773"/>
  </office:meta>
</office:document-meta>
</file>