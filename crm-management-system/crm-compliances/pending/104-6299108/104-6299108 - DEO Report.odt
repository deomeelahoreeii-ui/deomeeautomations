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8507in"/>
    </style:style>
    <style:style style:name="Table1.B" style:family="table-column">
      <style:table-column-properties style:column-width="3.77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991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he Chief Minister Complaint Center has received a complaint regarding the lack of proper cleanliness arrangements in government schools located on Gazi Road, Miller Road, and Shaukat Town. The complainant stated that there is no proper cleaning system in these schools. Classrooms and school areas are not cleaned by any designated staff. As a result, students, whether young or older, are forced to clean their classrooms themselves in the morning. It is further stated that the only available janitorial staff is limited to cleaning garbage from the school grounds, while no proper cleaning of classrooms is being done. When the school management was approached regarding this issue, they responded in a careless and inappropriate manner, stating that this is how government schools operate. The complainant requests that: Proper cleaning staff (janitorial system) be appointed and supervised in the schools. Students should not be assigned cleaning duties. The school management’s behavior and negligence be investigated. Clean and hygienic environment be ensured for students. Kindly take immediate action to improve the sanitation and management system in these schools.</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verification of the complaint has been carried out on the basis of available information and field report. The matter relates to cleanliness arrangements in Government schools located at/near Gazi Road, Miller Road, and Shaukat Town, and alleged involvement of students in classroom cleaning.</text:p>
            <text:p text:style-name="Standard"/>
            <text:p text:style-name="Standard">The concerned school heads/field formation have been sensitized to ensure proper cleanliness of classrooms and school premises through available janitorial arrangements and to ensure that students are not compelled to perform janitorial duties. Staff has also been advised to deal with parents/public in a courteous manner.</text:p>
            <text:p text:style-name="Standard"/>
            <text:p text:style-name="Standard">As per available report/record, no school-wise documentary evidence such as photographs, videos, written complaint, school names/EMIS, or staff details has been provided with the complaint. Therefore, on the basis of available record, the matter stands addressed at field level. However, in case the complainant provides school-wise evidence, the matter may be proceeded further in accordance with rules and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33S</meta:editing-duration>
    <dc:date>2026-06-19T20:55:13.215911992</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96" meta:character-count="2724" meta:non-whitespace-character-count="2341"/>
  </office:meta>
</office:document-meta>
</file>