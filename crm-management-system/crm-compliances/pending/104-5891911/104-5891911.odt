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64in" fo:margin-left="-0.2319in" table:align="left"/>
    </style:style>
    <style:style style:name="Table1.A" style:family="table-column">
      <style:table-column-properties style:column-width="3.0993in"/>
    </style:style>
    <style:style style:name="Table1.B" style:family="table-column">
      <style:table-column-properties style:column-width="4.5271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officeooo: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c8166"/>
    </style:style>
    <style:style style:name="P4" style:family="paragraph" style:parent-style-name="Standard_20__28_WW_29_">
      <style:paragraph-properties fo:margin-left="1in" fo:text-align="center" style:justify-single-word="false"/>
      <style:text-properties officeooo:paragraph-rsid="001c8166"/>
    </style:style>
    <style:style style:name="P5" style:family="paragraph" style:parent-style-name="Standard_20__28_WW_29_">
      <style:paragraph-properties fo:margin-left="1in" fo:text-align="center" style:justify-single-word="false"/>
      <style:text-properties officeooo:paragraph-rsid="0046cd95"/>
    </style:style>
    <style:style style:name="P6"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officeooo:paragraph-rsid="001c8166"/>
    </style:style>
    <style:style style:name="P8" style:family="paragraph" style:parent-style-name="Standard_20__28_WW_29_">
      <style:text-properties fo:color="#000000" loext:opacity="100%" style:font-name="Bookman Old Style" fo:font-weight="bold" officeooo:paragraph-rsid="003f469d" style:font-name-asian="Times New Roman" style:font-weight-asian="bold" style:font-name-complex="Calibri1" style:font-weight-complex="bold"/>
    </style:style>
    <style:style style:name="P9" style:family="paragraph" style:parent-style-name="Standard_20__28_WW_29_">
      <style:text-properties fo:color="#000000" loext:opacity="100%" style:font-name="Bookman Old Style" fo:font-weight="bold" officeooo: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officeooo:paragraph-rsid="002125b8"/>
    </style:style>
    <style:style style:name="P11" style:family="paragraph" style:parent-style-name="Table_20_Contents">
      <style:paragraph-properties fo:text-align="center" style:justify-single-word="false"/>
      <style:text-properties fo:font-weight="bold" officeooo:rsid="001d93e2" officeooo:paragraph-rsid="001d93e2" style:font-weight-asian="bold" style:font-weight-complex="bold"/>
    </style:style>
    <style:style style:name="P12"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c8166" style:font-name-asian="Times New Roman" style:font-size-asian="12pt" style:font-style-asian="normal" style:font-weight-asian="normal" style:font-name-complex="Calibri1" style:font-weight-complex="normal"/>
    </style:style>
    <style:style style:name="P13"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c8166"/>
    </style:style>
    <style:style style:name="P14"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c8166"/>
    </style:style>
    <style:style style:name="P15" style:family="paragraph" style:parent-style-name="Standard_20__28_WW_29_">
      <style:paragraph-properties fo:margin-left="3in" fo:text-align="center" style:justify-single-word="false"/>
      <style:text-properties fo:color="#000000" loext:opacity="100%" style:font-name="Bookman Old Style" fo:font-weight="bold" officeooo:paragraph-rsid="001c8166" style:font-weight-asian="bold"/>
    </style:style>
    <style:style style:name="P16" style:family="paragraph" style:parent-style-name="Standard_20__28_WW_29_">
      <style:paragraph-properties fo:margin-left="3in" fo:text-align="center" style:justify-single-word="false"/>
      <style:text-properties officeooo:paragraph-rsid="003d9c8e"/>
    </style:style>
    <style:style style:name="P17" style:family="paragraph" style:parent-style-name="List_20_Paragraph">
      <style:paragraph-properties fo:margin-left="0in"/>
      <style:text-properties officeooo:paragraph-rsid="001c8166"/>
    </style:style>
    <style:style style:name="P18" style:family="paragraph" style:parent-style-name="List_20_Paragraph" style:list-style-name="WWNum1">
      <style:paragraph-properties fo:margin-top="0in" fo:margin-bottom="0.111in" style:contextual-spacing="true"/>
      <style:text-properties fo:color="#000000" loext:opacity="100%" style:font-name="Bookman Old Style" officeooo:paragraph-rsid="001c8166"/>
    </style:style>
    <style:style style:name="P19" style:family="paragraph" style:parent-style-name="List_20_Paragraph">
      <style:paragraph-properties fo:margin-left="0in" fo:margin-top="0in" fo:margin-bottom="0.111in" style:contextual-spacing="true" fo:text-indent="0in" style:auto-text-indent="false"/>
      <style:text-properties fo:color="#000000" loext:opacity="100%" style:font-name="Bookman Old Style" officeooo:rsid="003bb5e8" officeooo:paragraph-rsid="003bb5e8"/>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officeooo: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officeooo: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officeooo: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officeooo: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officeooo:rsid="0057ee17" style:language-asian="en" style:country-asian="US" style:font-weight-asian="bold" style:font-name-complex="Calibri1" style:language-complex="ar" style:country-complex="SA"/>
    </style:style>
    <style:style style:name="T10" style:family="text">
      <style:text-properties fo:color="#000000" loext:opacity="100%" style:font-name="Bookman Old Style" fo:font-weight="bold" style:font-name-asian="Times New Roman" style:font-weight-asian="bold" style:font-name-complex="Calibri1" style:font-weight-complex="bold"/>
    </style:style>
    <style:style style:name="T11" style:family="text">
      <style:text-properties officeooo:rsid="003fa767"/>
    </style:style>
    <style:style style:name="T12"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loext: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loext:opacity="100%" style:font-name="Bookman Old Style"/>
    </style:style>
    <style:style style:name="T16"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5" loext:marker-style-name="T4"><text:span text:style-name="T4">No. </text:span><text:span text:style-name="T5">1510/PMDU</text:span><text:span text:style-name="T6">/</text:span><text:span text:style-name="T7">CRM</text:span></text:p>
            <text:p text:style-name="P5" loext:marker-style-name="T3"><text:span text:style-name="T8">Dated </text:span><text:span text:style-name="T5">17</text:span><text:span text:style-name="T8">/0</text:span><text:span text:style-name="T9">6</text:span><text:span text:style-name="T8">/2026</text:span></text:p>
          </table:table-cell>
        </table:table-row>
      </table:table>
      <text:p text:style-name="P6" loext:marker-style-name="T1"><text:span text:style-name="Strong_20_Emphasis"><text:span text:style-name="T1"/></text:span></text:p>
      <text:p text:style-name="P7" loext:marker-style-name="T10"><text:span text:style-name="T10">To: <text:tab/><text:tab/></text:span></text:p>
      <text:p text:style-name="P8" loext:marker-style-name="T10"><text:tab/><text:tab/><text:span text:style-name="T11">The </text:span>Chief Executive Officer (DEA), </text:p>
      <text:p text:style-name="P8" loext:marker-style-name="T10"><text:tab/><text:tab/>Lahore</text:p>
      <text:p text:style-name="P9" loext: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5891911</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 text:style-name="Standard">Sir I would like come to know the status of complaint 1045891911 dated 1.5.2026.</text:p>
          </table:table-cell>
          <table:table-cell table:style-name="Table1.B2" office:value-type="string">
            <text:p text:style-name="Text_20_body">Respected Worthy Chief Executive Officer (DEA),</text:p>
            <text:p text:style-name="Text_20_body">Reference to the complaint received through CM Complaint Portal and forwarded by your good office.</text:p>
            <text:p text:style-name="Text_20_body">It is respectfully submitted that the present complaint seeks the status of earlier Complaint No. 1045891911 dated 01.05.2026, relating to an alleged difference in the fee structure for existing and newly admitted students.</text:p>
            <text:p text:style-name="Text_20_body">As per available record, the earlier complaint was reviewed and the concerned field formation was sensitized to ensure that fee structures and administrative practices of privately managed schools remain transparent, non-discriminatory, and in accordance with applicable rules and policy. However, the complaint did not contain the name and complete address of the school, comparative fee vouchers, receipts, written notices, or any other supporting documentary evidence. Consequently, case-specific proceedings could not be undertaken, and the matter was addressed on the basis of the available information.</text:p>
            <text:p text:style-name="Text_20_body">In case the complainant provides complete particulars of the institution along with previous and current fee vouchers or other relevant documentary evidence, the matter may be examined and proceeded further in accordance with rules and policy. The status of the earlier complaint accordingly stands conveyed.</text:p>
            <text:p text:style-name="Text_20_body">Submitted for kind perusal and further necessary action, please.</text:p>
            <text:p text:style-name="Standard"/>
          </table:table-cell>
        </table:table-row>
      </table:table>
      <text:p text:style-name="P12"><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3" loext:marker-style-name="T15"/>
      <text:p text:style-name="P14" loext:marker-style-name="T15"/>
      <text:p text:style-name="P15" loext:marker-style-name="T16"/>
      <text:p text:style-name="P15" loext:marker-style-name="T16"/>
      <text:p text:style-name="P15" loext:marker-style-name="T16"/>
      <text:p text:style-name="P16" loext:marker-style-name="T16"><text:span text:style-name="T16">DISTRICT EDUCATION OFFICER (M-EE)</text:span></text:p>
      <text:p text:style-name="P16" loext:marker-style-name="T16"><text:span text:style-name="T16">LAHORE</text:span></text:p>
      <text:p text:style-name="P7" loext:marker-style-name="T16"><text:span text:style-name="T16">CC.</text:span></text:p>
      <text:p text:style-name="P17"/>
      <text:list text:style-name="WWNum1">
        <text:list-item>
          <text:p text:style-name="P18">Office Record. </text:p>
        </text:list-item>
      </text:list>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8</meta:editing-cycles>
    <meta:editing-duration>PT3H4M49S</meta:editing-duration>
    <dc:date>2026-07-14T09:20:40.110695166</dc:date>
    <meta:generator>LibreOffice/26.2.4.2$Linux_X86_64 LibreOffice_project/64a984c51f4702dbd3710b13428c673a2f1292e7</meta:generator>
    <meta:print-date>2026-05-11T15:31:55.957393221</meta:print-date>
    <meta:printed-by>PDF files</meta:printed-by>
    <meta:document-statistic meta:table-count="2" meta:image-count="2" meta:object-count="0" meta:page-count="1" meta:paragraph-count="22" meta:word-count="241" meta:character-count="1682" meta:non-whitespace-character-count="1454"/>
  </office:meta>
</office:document-meta>
</file>