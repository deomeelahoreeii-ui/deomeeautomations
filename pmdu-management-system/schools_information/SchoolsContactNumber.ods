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Spectral School</text:p>
          </table:table-cell>
          <table:table-cell office:value-type="float" office:value="3265040789" calcext:value-type="float">
            <text:p>32650407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09:55:10.911897880</meta:creation-date>
    <dc:date>2026-05-21T09:56:25.406877140</dc:date>
    <meta:editing-duration>PT1M14S</meta:editing-duration>
    <meta:editing-cycles>2</meta:editing-cycles>
    <meta:generator>LibreOffice/26.2.3.2$Linux_X86_64 LibreOffice_project/ca14918b0fa569b9db704e10d20c5d2a5a16ac6d</meta:generator>
    <meta:document-statistic meta:table-count="1" meta:cell-count="5" meta:object-count="0"/>
  </office:meta>
</office:document-meta>
</file>