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Junior Campus High School For Boys,</text:p>
      <text:p text:style-name="P6" loext:marker-style-name="T9"><text:tab/><text:tab/><text:span text:style-name="T10">City</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80626-92613758)</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80626-92613758)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City,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City,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