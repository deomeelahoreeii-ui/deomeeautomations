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Pak-Turk Maarif International Schools and Colleges,</text:p>
      <text:p text:style-name="P6" loext:marker-style-name="T9"><text:tab/><text:tab/><text:span text:style-name="T10">Raiwind</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240326-92478359)</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240326-92478359)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Raiwind,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Raiwind,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