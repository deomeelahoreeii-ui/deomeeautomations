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School Name / Address / Area,</text:p>
      <text:p text:style-name="P6" loext:marker-style-name="T9"><text:tab/><text:tab/><text:span text:style-name="T10">Model Town</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20626-92603730)</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20626-92603730)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Model Town,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Model Town,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